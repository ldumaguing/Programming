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dadd7" officeooo:paragraph-rsid="000dadd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officeooo:rsid="000e1ca3" officeooo:paragraph-rsid="000e1ca3" style:font-size-asian="11pt" style:font-size-complex="11pt"/>
    </style:style>
    <style:style style:name="P3" style:family="paragraph" style:parent-style-name="Standard">
      <style:text-properties fo:font-size="11pt" officeooo:rsid="0016582a" officeooo:paragraph-rsid="0016582a" style:font-size-asian="11pt" style:font-size-complex="11pt"/>
    </style:style>
    <style:style style:name="P4" style:family="paragraph" style:parent-style-name="Standard">
      <style:text-properties fo:font-size="11pt" officeooo:rsid="001a9e45" officeooo:paragraph-rsid="001a9e45" style:font-size-asian="11pt" style:font-size-complex="11pt"/>
    </style:style>
    <style:style style:name="P5" style:family="paragraph" style:parent-style-name="Standard">
      <style:text-properties fo:font-size="11pt" officeooo:rsid="001b5791" officeooo:paragraph-rsid="001b5791" style:font-size-asian="11pt" style:font-size-complex="11pt"/>
    </style:style>
    <style:style style:name="P6" style:family="paragraph" style:parent-style-name="Standard">
      <style:text-properties fo:font-size="11pt" officeooo:rsid="001dcf05" officeooo:paragraph-rsid="001dcf05" style:font-size-asian="11pt" style:font-size-complex="11pt"/>
    </style:style>
    <style:style style:name="P7" style:family="paragraph" style:parent-style-name="Standard">
      <style:text-properties fo:font-size="11pt" officeooo:rsid="001eb959" officeooo:paragraph-rsid="001eb959" style:font-size-asian="11pt" style:font-size-complex="11pt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eb959" officeooo:paragraph-rsid="001eb959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1pt" officeooo:rsid="001f5010" officeooo:paragraph-rsid="001f5010" style:font-size-asian="11pt" style:font-size-complex="11pt"/>
    </style:style>
    <style:style style:name="P10" style:family="paragraph" style:parent-style-name="Standard">
      <style:text-properties fo:font-size="11pt" officeooo:rsid="0021938d" officeooo:paragraph-rsid="0021938d" style:font-size-asian="11pt" style:font-size-complex="11pt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22f0ca" officeooo:paragraph-rsid="0022f0c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1pt" officeooo:rsid="0022f0ca" officeooo:paragraph-rsid="0022f0ca" style:font-size-asian="11pt" style:font-size-complex="11pt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26c9c3" officeooo:paragraph-rsid="0026c9c3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1pt" officeooo:rsid="0026c9c3" officeooo:paragraph-rsid="0026c9c3" style:font-size-asian="11pt" style:font-size-complex="11pt"/>
    </style:style>
    <style:style style:name="P15" style:family="paragraph" style:parent-style-name="Standard" style:list-style-name="List_20_1">
      <style:text-properties fo:font-size="11pt" officeooo:rsid="0028b938" officeooo:paragraph-rsid="0028b938" style:font-size-asian="11pt" style:font-size-complex="11pt"/>
    </style:style>
    <style:style style:name="P16" style:family="paragraph" style:parent-style-name="Standard">
      <style:text-properties fo:font-size="11pt" officeooo:rsid="0028b938" officeooo:paragraph-rsid="0028b938" style:font-size-asian="11pt" style:font-size-complex="11pt"/>
    </style:style>
    <style:style style:name="P17" style:family="paragraph" style:parent-style-name="Standard">
      <style:text-properties fo:font-size="11pt" fo:font-style="italic" officeooo:rsid="00293d3c" officeooo:paragraph-rsid="00293d3c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size="11pt" officeooo:rsid="00293d3c" officeooo:paragraph-rsid="00293d3c" style:font-size-asian="11pt" style:font-size-complex="11pt"/>
    </style:style>
    <style:style style:name="P19" style:family="paragraph" style:parent-style-name="Standard" style:list-style-name="List_20_1">
      <style:text-properties fo:font-size="11pt" officeooo:rsid="002a10c6" officeooo:paragraph-rsid="002a10c6" style:font-size-asian="11pt" style:font-size-complex="11pt"/>
    </style:style>
    <style:style style:name="P20" style:family="paragraph" style:parent-style-name="Standard" style:list-style-name="List_20_1">
      <style:text-properties fo:font-size="11pt" officeooo:rsid="002f08f3" officeooo:paragraph-rsid="002f08f3" style:font-size-asian="11pt" style:font-size-complex="11pt"/>
    </style:style>
    <style:style style:name="P21" style:family="paragraph" style:parent-style-name="Standard">
      <style:text-properties fo:font-size="11pt" officeooo:rsid="002f08f3" officeooo:paragraph-rsid="002f08f3" style:font-size-asian="11pt" style:font-size-complex="11pt"/>
    </style:style>
    <style:style style:name="P22" style:family="paragraph" style:parent-style-name="Standard">
      <style:text-properties fo:font-size="11pt" fo:font-style="italic" officeooo:rsid="002f08f3" officeooo:paragraph-rsid="002f08f3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Liberation Sans Narrow" fo:font-size="9pt" fo:font-style="normal" fo:font-weight="normal" officeooo:rsid="003186e9" officeooo:paragraph-rsid="003186e9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text-properties fo:font-size="11pt" officeooo:rsid="003186e9" officeooo:paragraph-rsid="003186e9" style:font-size-asian="11pt" style:font-size-complex="11pt"/>
    </style:style>
    <style:style style:name="P25" style:family="paragraph" style:parent-style-name="Standard" style:list-style-name="List_20_1">
      <style:text-properties fo:font-size="11pt" officeooo:rsid="00325c36" officeooo:paragraph-rsid="00325c36" style:font-size-asian="11pt" style:font-size-complex="11pt"/>
    </style:style>
    <style:style style:name="P26" style:family="paragraph" style:parent-style-name="Standard" style:list-style-name="List_20_1">
      <style:text-properties fo:font-size="11pt" officeooo:rsid="0033b37d" officeooo:paragraph-rsid="0033b37d" style:font-size-asian="11pt" style:font-size-complex="11pt"/>
    </style:style>
    <style:style style:name="P27" style:family="paragraph" style:parent-style-name="Standard">
      <style:text-properties fo:font-size="11pt" officeooo:rsid="0033b37d" officeooo:paragraph-rsid="0033b37d" style:font-size-asian="11pt" style:font-size-complex="11pt"/>
    </style:style>
    <style:style style:name="T1" style:family="text">
      <style:text-properties officeooo:rsid="00152cac"/>
    </style:style>
    <style:style style:name="T2" style:family="text">
      <style:text-properties officeooo:rsid="00100aea"/>
    </style:style>
    <style:style style:name="T3" style:family="text">
      <style:text-properties officeooo:rsid="00106c23"/>
    </style:style>
    <style:style style:name="T4" style:family="text">
      <style:text-properties officeooo:rsid="0011b50c"/>
    </style:style>
    <style:style style:name="T5" style:family="text">
      <style:text-properties officeooo:rsid="0016d3ba"/>
    </style:style>
    <style:style style:name="T6" style:family="text">
      <style:text-properties officeooo:rsid="0018c4a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1938d"/>
    </style:style>
    <style:style style:name="T9" style:family="text">
      <style:text-properties officeooo:rsid="0021b4ab"/>
    </style:style>
    <style:style style:name="T10" style:family="text">
      <style:text-properties officeooo:rsid="0022f0ca"/>
    </style:style>
    <style:style style:name="T11" style:family="text">
      <style:text-properties officeooo:rsid="0026b5e6"/>
    </style:style>
    <style:style style:name="T12" style:family="text">
      <style:text-properties officeooo:rsid="00257925"/>
    </style:style>
    <style:style style:name="T13" style:family="text">
      <style:text-properties officeooo:rsid="0028b938"/>
    </style:style>
    <style:style style:name="T14" style:family="text">
      <style:text-properties officeooo:rsid="00293d3c"/>
    </style:style>
    <style:style style:name="T15" style:family="text">
      <style:text-properties officeooo:rsid="002a10c6"/>
    </style:style>
    <style:style style:name="T16" style:family="text">
      <style:text-properties officeooo:rsid="002dcd54"/>
    </style:style>
    <style:style style:name="T17" style:family="text">
      <style:text-properties officeooo:rsid="003186e9"/>
    </style:style>
    <style:style style:name="T18" style:family="text">
      <style:text-properties officeooo:rsid="0039255c"/>
    </style:style>
    <style:style style:name="T19" style:family="text">
      <style:text-properties officeooo:rsid="00325c36"/>
    </style:style>
    <style:style style:name="T20" style:family="text">
      <style:text-properties officeooo:rsid="0033b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.0 CLOSE ASSAULT</text:p>
      <text:p text:style-name="P2">Undisrupted <text:span text:style-name="T1">c</text:span>ombatants that are not marked Fired may Close Assault adjacent (white font CAF units may assault same hex, see 7.3) combatants in the Close Assault Phase. <text:s/><text:span text:style-name="T2">Combatants whose Close Assault Firepower (CAF) is succeeded by an asterisk may not initiate Close Assault but may defend. <text:s/>It is NOT mandatory to attack adjacent combatants, but it IS mandatory to participate (either as an attacker or defender) in a Close Assault against same-hex enemy combatants (see 7.3). <text:s/>To participate in the attack the target hex terrain type must not be prohibited to the attacker, nor may the attacker attack across a prohibited hexside. <text:s/></text:span><text:span text:style-name="T3">The side with the initiative conducts the first Close Assault, and then the players alternate Close Assaults. <text:s/>A combatant may not initiate more that one Close Assault in a turn, but may be the target of more than one Close Assault in a turn. <text:s/></text:span><text:span text:style-name="T4">When conducting a Close Assault, you must attack all combatants in the hex.</text:span></text:p>
      <text:p text:style-name="P2"/>
      <text:p text:style-name="P3">All qualifying adjacent combatants may attack the target hex (exception, see 7.3). <text:s/>The player initiating the Close Assault is the attacker. <text:s/>Add the CAF of all attacking combatants and compare the attacking total to the CAF of the combatants in the target hex. Express the result as an odds ratio – attacking combat factors versus defending combat factors. <text:s/>For example, 8 attacking combat factors versus 4 defending factors would be 2-1 odds. <text:s/>Fractions are dropped. <text:s/>So, 10 attacking combat factors versus 4 defending combat factors would still be 2-1 odds, but 12 attacking factors versus 4 defending is 3-1 odds. Disrupted defenders defend with ½ of their <text:span text:style-name="T5">total CAF (fractions dropped), but always with at least a CAF of 1. <text:s/>This odds </text:span><text:span text:style-name="T6">ratio corresponds to a column on the Close Assault Table (CAT). <text:s/>Modify the column as per the TEC. <text:s/>If both Leg and AFVs are defending a hex, use the most beneficial TEC modifier to the defender. Roll 1d10 and consult the CAT.</text:span></text:p>
      <text:p text:style-name="P3"/>
      <text:p text:style-name="P4">The results are displayed as possible hits. <text:s/>The number to the <text:span text:style-name="T7">right</text:span> of the slash is the number of possible hits inflicted on the defender, the number to the <text:span text:style-name="T7">left</text:span> is the number of possible hits inflicted on the attacker.</text:p>
      <text:p text:style-name="P4"/>
      <text:p text:style-name="P5">The defender rolls 1d10 for each possible hit. Compare each die roll to the target’s morale. <text:s/>As in 2.3, a roll that is less than or equal to the morale succeeds, negating a hit. <text:s/>The remaining hits are applied to the target (if only one) or evenly distributed among the targets in the hex if there is more than one. <text:s/>If evenly distributing the hits among two targets ensure that both targets receive one hit before any receives two. <text:s/>If there is an odd number of hits, randomly determine which combatant receives the extra hit.</text:p>
      <text:p text:style-name="P6"/>
      <text:p text:style-name="P6">If same-side combatants of differing morale are involved in a Close Assault, use the higher morale to resolve all hits (exception, Zombies, 12.1).</text:p>
      <text:p text:style-name="P6"/>
      <text:p text:style-name="P7">Units may not attack in Assault Combat at odds lower than 1-3 (exception, Zombies).</text:p>
      <text:p text:style-name="P7"/>
      <text:p text:style-name="P7">Place a Fired marker on combatants that participate in a Close Assault.</text:p>
      <text:p text:style-name="P7"/>
      <text:p text:style-name="P8">7.1 Retreat and Advance after Assault Combatants</text:p>
      <text:p text:style-name="P9">If the defender receives more hits than the attacker, it must retreat one hex, and the attacker may occupy the vacated hex. <text:s/><text:span text:style-name="T8">Only Eligible Combatants (EC) that participated in the attack may advance into a vacated hex.</text:span></text:p>
      <text:p text:style-name="P9"/>
      <text:p text:style-name="P10">The defenders’ <text:span text:style-name="T9">retreat must be in a general direction away from the attacking forces. <text:s/>If the defender must retreat into a hex containing two friendly combatants, it mus continue retreating and both friendly combatants are disrupted (retreating unit unaffected). <text:s/>A defender may not retreat into an enemy’s hex. <text:s/>A defender may not retreat into an enemy’s hex. <text:s/>A retreating defender or stack of defenders takes an additional hit if retreating into a ZOC. <text:s/></text:span><text:span text:style-name="T10">If a defender cannot retreat, it is eliminated. <text:s/>If the defender is eliminated the undisrupted attackers may also advance into the vacated hex. <text:s/>The defenders may never advance, even if the attackers are eliminated.</text:span></text:p>
      <text:p text:style-name="P10"/>
      <text:p text:style-name="P11">7.2 <text:span text:style-name="T11">Flanking</text:span></text:p>
      <text:p text:style-name="P12">If the <text:span text:style-name="T12">assaulting combatants are attacking the defender from two, non-adjacent hex sides, the defender is flanked. <text:s/>Shift the odds on the CAT one column to the right.</text:span></text:p>
      <text:p text:style-name="P12"/>
      <text:p text:style-name="P13">7.3 Same Hex Assaults</text:p>
      <text:p text:style-name="P14">Several combatants enter their <text:span text:style-name="T13">enemies’ hex to conduct Close Assault. <text:s/>These combatants are identified either by the white font that they use for their CAF or the Bloodthirsty ability icon (which allows them to attack from either in-hex or adjacent to hex). <text:s/>These combatants include Lycans, Vampires, Zombies, and Champions such as Tentani and combatants with the Bloodthirsty ability.</text:span></text:p>
      <text:p text:style-name="P14"/>
      <text:list text:style-name="List_20_1">
        <text:list-item>
          <text:p text:style-name="P15">Units may <text:span text:style-name="T14">only enter a hex with an enemy combatant if the entering unit has a white font CAF, the Bloodthirsty ability, or all non-friendly units in the hex to be entered do not have a CAF.</text:span></text:p>
        </text:list-item>
      </text:list>
      <text:p text:style-name="P16"/>
      <text:p text:style-name="P17">For example, <text:span text:style-name="T15">Lycans with their CAF of 16 can/must enter any enemy hex to conduct Close Assault. <text:s/>By the </text:span><text:soft-page-break/><text:span text:style-name="T15">same token any unit may enter a Refugees’ hex as they have no CAF.</text:span></text:p>
      <text:p text:style-name="P18"/>
      <text:list text:continue-numbering="true" text:style-name="List_20_1">
        <text:list-item>
          <text:p text:style-name="P19">EC may <text:span text:style-name="T16">fire on enemy combatants entering their hex in the Movement Phase (Opportunity Fire). <text:s/>Such fire receives the Short-Range column shift regardless of the attacking unit’s HEF range block color (including black) and font color. <text:s/>Combatants disrupted by such an attack, retreat to the hex from which they entered into the Close Assault hex.</text:span></text:p>
        </text:list-item>
        <text:list-item>
          <text:p text:style-name="P20">Assault combat must occur between co-located units in the Close Assault Phase.</text:p>
        </text:list-item>
        <text:list-item>
          <text:p text:style-name="P20">The side with the first unit to enter an enemy occupied hex becomes the attacker in the assault. <text:s/>When alternating assaults in the Close Assault Phase this person must designate the hex as their assault at some point in the phase.</text:p>
        </text:list-item>
        <text:list-item>
          <text:p text:style-name="P20">There are no terrain modifications for either side in co-located assaults.</text:p>
        </text:list-item>
        <text:list-item>
          <text:p text:style-name="P20">Friendly units adjacent to a hex being assaulted by units in the hex may not assist in the assault.</text:p>
        </text:list-item>
      </text:list>
      <text:p text:style-name="P21"/>
      <text:p text:style-name="P22">For example, <text:span text:style-name="T17">a Clan Militia unit adjacent to a hex in which a Lycan is attacking an American Infantry unit may not assist in the assault. <text:s/>Of course they may indirectly assist by firing at the target of the assault (hopefully disrupting it) in the fire phase before the Lycan move into the hex to assault.</text:span></text:p>
      <text:p text:style-name="P21"/>
      <text:p text:style-name="P23">Mark <text:span text:style-name="T18">S</text:span>ays. <text:s/><text:span text:style-name="T19">What’s the logic? <text:s/>Well the usual Long Road assault between adjacent units represents a close range (25-50 meters) fight, not necessarily hand-to-hand combat. <text:s/>Units in the hex, such as Lycan or Vampires, do represent hand-to-hand combat. <text:s/>It would be difficult, if not impossible, for units to fire into the hex for fear of hitting their own people.</text:span></text:p>
      <text:p text:style-name="P24"/>
      <text:list text:continue-numbering="true" text:style-name="List_20_1">
        <text:list-item>
          <text:p text:style-name="P25">Determine <text:span text:style-name="T20">the winner of the assault normally. <text:s/>Co-located units that are defeated retreat from the hex. Defeated attackers return to the hexes from which they entered the assault hex. <text:s/>Defenders attempt to retreat away from attackers, as per the rules under (7.1)</text:span></text:p>
        </text:list-item>
        <text:list-item>
          <text:p text:style-name="P26">If the attackers are unable to muster 1-3 odds (exception: Zombies), they are disrupted and must retreat from the hex. <text:s/>In such case, retreating Champions take 1 hit.</text:p>
        </text:list-item>
        <text:list-item>
          <text:p text:style-name="P26">You may not fire out of or into a jointly occupied hex.</text:p>
        </text:list-item>
        <text:list-item>
          <text:p text:style-name="P26">Close Assault against hexes containing 2 opposing forces (possible in 3-sided scenarios) attack both groups of units. <text:s/>In this case loses are assessed equally and randomly.</text:p>
        </text:list-item>
        <text:list-item>
          <text:p text:style-name="P26">You cannot move out of a jointly occupied hex, except when forced to by a combat result.</text:p>
        </text:list-item>
        <text:list-item>
          <text:p text:style-name="P26">Units in a jointly occupied hex do not have a ZOC.</text:p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1:52:58.148555602</meta:creation-date>
    <dc:date>2026-03-31T16:20:50.326402614</dc:date>
    <meta:editing-duration>PT2H16M10S</meta:editing-duration>
    <meta:editing-cycles>41</meta:editing-cycles>
    <meta:generator>LibreOffice/25.8.5.2$Linux_X86_64 LibreOffice_project/580$Build-2</meta:generator>
    <meta:print-date>2026-03-31T14:07:14.359548228</meta:print-date>
    <meta:printed-by>PDF files</meta:printed-by>
    <meta:document-statistic meta:table-count="0" meta:image-count="0" meta:object-count="0" meta:page-count="2" meta:paragraph-count="30" meta:word-count="1224" meta:character-count="7164" meta:non-whitespace-character-count="5938"/>
  </office:meta>
</office:document-meta>
</file>