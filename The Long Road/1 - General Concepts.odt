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style:text-underline-style="solid" style:text-underline-width="auto" style:text-underline-color="font-color" fo:font-weight="bold" officeooo:rsid="0039c1ee" officeooo:paragraph-rsid="000dadd7" style:font-size-asian="14pt" style:font-weight-asian="bold" style:font-size-complex="14pt" style:font-weight-complex="bold"/>
    </style:style>
    <style:style style:name="P2" style:family="paragraph" style:parent-style-name="Standard">
      <style:text-properties style:font-name="Liberation Serif" fo:font-size="11pt" fo:font-style="normal" style:text-underline-style="none" fo:font-weight="normal" officeooo:rsid="0039c1ee" officeooo:paragraph-rsid="0039c1ee" style:font-size-asian="11pt" style:font-style-asian="normal" style:font-weight-asian="normal" style:font-size-complex="11pt" style:font-style-complex="normal" style:font-weight-complex="normal"/>
    </style:style>
    <style:style style:name="P3" style:family="paragraph" style:parent-style-name="Standard">
      <style:text-properties style:font-name="Liberation Sans Narrow" fo:font-size="9pt" fo:font-style="normal" style:text-underline-style="none" fo:font-weight="normal" officeooo:rsid="003d1420" officeooo:paragraph-rsid="003d1420" style:font-size-asian="9pt" style:font-style-asian="normal" style:font-weight-asian="normal" style:font-size-complex="9pt" style:font-style-complex="normal" style:font-weight-complex="normal"/>
    </style:style>
    <style:style style:name="P4" style:family="paragraph" style:parent-style-name="Standard">
      <style:text-properties style:font-name="Liberation Sans Narrow" fo:font-size="9pt" fo:font-style="normal" style:text-underline-style="none" fo:font-weight="normal" officeooo:rsid="003d3d83" officeooo:paragraph-rsid="003d3d83" style:font-size-asian="9pt" style:font-style-asian="normal" style:font-weight-asian="normal" style:font-size-complex="9pt" style:font-style-complex="normal" style:font-weight-complex="normal"/>
    </style:style>
    <style:style style:name="P5" style:family="paragraph" style:parent-style-name="Standard">
      <style:text-properties style:font-name="Liberation Serif" fo:font-size="11pt" fo:font-style="normal" style:text-underline-style="none" fo:font-weight="normal" officeooo:rsid="003d3d83" officeooo:paragraph-rsid="003d3d83" style:font-size-asian="11pt" style:font-style-asian="normal" style:font-weight-asian="normal" style:font-size-complex="11pt" style:font-style-complex="normal" style:font-weight-complex="normal"/>
    </style:style>
    <style:style style:name="P6" style:family="paragraph" style:parent-style-name="Standard">
      <style:text-properties style:font-name="Liberation Serif" fo:font-size="12pt" fo:font-style="normal" style:text-underline-style="solid" style:text-underline-width="auto" style:text-underline-color="font-color" fo:font-weight="bold" officeooo:rsid="003d3d83" officeooo:paragraph-rsid="003d3d83" style:font-size-asian="12pt" style:font-style-asian="normal" style:font-weight-asian="bold" style:font-size-complex="12pt" style:font-style-complex="normal" style:font-weight-complex="bold"/>
    </style:style>
    <style:style style:name="P7" style:family="paragraph" style:parent-style-name="Standard">
      <style:text-properties style:font-name="Liberation Serif" fo:font-size="12pt" fo:font-style="normal" style:text-underline-style="solid" style:text-underline-width="auto" style:text-underline-color="font-color" fo:font-weight="bold" officeooo:rsid="003e9f9f" officeooo:paragraph-rsid="003e9f9f" style:font-size-asian="12pt" style:font-style-asian="normal" style:font-weight-asian="bold" style:font-size-complex="12pt" style:font-style-complex="normal" style:font-weight-complex="bold"/>
    </style:style>
    <style:style style:name="P8" style:family="paragraph" style:parent-style-name="Standard">
      <style:text-properties style:font-name="Liberation Serif" fo:font-size="11pt" fo:font-style="normal" style:text-underline-style="none" fo:font-weight="normal" officeooo:rsid="003e9f9f" officeooo:paragraph-rsid="003e9f9f" style:font-size-asian="11pt" style:font-style-asian="normal" style:font-weight-asian="normal" style:font-size-complex="11pt" style:font-style-complex="normal" style:font-weight-complex="normal"/>
    </style:style>
    <style:style style:name="P9" style:family="paragraph" style:parent-style-name="Standard">
      <style:text-properties style:font-name="Liberation Serif" fo:font-size="11pt" fo:font-style="normal" style:text-underline-style="solid" style:text-underline-width="auto" style:text-underline-color="font-color" fo:font-weight="bold" officeooo:rsid="004057e7" officeooo:paragraph-rsid="004057e7" style:font-size-asian="11pt" style:font-style-asian="normal" style:font-weight-asian="bold" style:font-size-complex="11pt" style:font-style-complex="normal" style:font-weight-complex="bold"/>
    </style:style>
    <style:style style:name="P10" style:family="paragraph" style:parent-style-name="Standard">
      <style:text-properties style:font-name="Liberation Serif" fo:font-size="11pt" fo:font-style="normal" style:text-underline-style="none" fo:font-weight="normal" officeooo:rsid="004057e7" officeooo:paragraph-rsid="004057e7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officeooo:rsid="003b722c"/>
    </style:style>
    <style:style style:name="T2" style:family="text">
      <style:text-properties officeooo:rsid="003d3d83"/>
    </style:style>
    <style:style style:name="T3" style:family="text">
      <style:text-properties officeooo:rsid="003e9f9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0 GENERAL CONCEPTS</text:p>
      <text:p text:style-name="P2">The map <text:span text:style-name="T1">covers a fictitious landscape over which the combatants do battle. <text:s/>The counters represent vehicle platoons (2-5 vehicles), infantry and militia platoons (40-60 men), Zombie mobs, Lycan packs, groups of vampires (monsters for short), refugees, armed mobs, Legends (1.5), and various support teams. <text:s/>Each turn represents fifteen minutes to one hour. <text:s/>Each hex represents approximately 150 meters.</text:span></text:p>
      <text:p text:style-name="P2"/>
      <text:p text:style-name="P3">Mark Says. <text:s/>Whenever you are dealing with modern combat, you need to do some serious range truncation. If you don’t, you’ll end up with teeny-weeny counters on huge maps and need to check Line Of Sight from your game room to the bathroom. <text:s/>That’s simply not fun in my book. <text:s/>Suffice to say, I’ve need<text:span text:style-name="T2">ed to do some serious fudging with the weapon ranges.</text:span></text:p>
      <text:p text:style-name="P3"/>
      <text:p text:style-name="P4">Heroics. <text:s/>There are events and Legends in this game that are meant to be larger than life. <text:s/>Because of this the scale is somewhat scalable, so to speak. <text:s/>For example, heroes can represent more than just the named individual, but rather the hero and his posse, for lack of a better word.</text:p>
      <text:p text:style-name="P5"/>
      <text:p text:style-name="P6">1.1 Dice</text:p>
      <text:p text:style-name="P5">Numerous ten-sided dice (d10) <text:span text:style-name="T3">determine the results of Fire Combat, Close Assaults, and other game functions. <text:s/>“0” is considered “0” and an even number.</text:span></text:p>
      <text:p text:style-name="P5"/>
      <text:p text:style-name="P7">1.2 Game Pieces</text:p>
      <text:p text:style-name="P8">The Long Road is played using large 1” square game pieces. <text:s/>These pieces fall into two broad categories, Combatants and Markers.</text:p>
      <text:p text:style-name="P8"/>
      <text:p text:style-name="P9">1.2a Combatants</text:p>
      <text:p text:style-name="P10">These are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 style:font-charset="x-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75in" fo:margin-right="0.7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31T11:52:58.148555602</meta:creation-date>
    <dc:date>2026-03-31T16:32:11.756568464</dc:date>
    <meta:editing-duration>PT2H30M14S</meta:editing-duration>
    <meta:editing-cycles>46</meta:editing-cycles>
    <meta:generator>LibreOffice/25.8.5.2$Linux_X86_64 LibreOffice_project/580$Build-2</meta:generator>
    <meta:print-date>2026-03-31T14:07:14.359548228</meta:print-date>
    <meta:printed-by>PDF files</meta:printed-by>
    <meta:document-statistic meta:table-count="0" meta:image-count="0" meta:object-count="0" meta:page-count="1" meta:paragraph-count="10" meta:word-count="231" meta:character-count="1389" meta:non-whitespace-character-count="1157"/>
  </office:meta>
</office:document-meta>
</file>