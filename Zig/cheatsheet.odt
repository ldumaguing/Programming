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>
          <style:tab-stop style:position="3.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reformatted_20_Text">
      <style:paragraph-properties>
        <style:tab-stops>
          <style:tab-stop style:position="3.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Preformatted_20_Text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Preformatted_20_Text">
      <style:paragraph-properties>
        <style:tab-stops>
          <style:tab-stop style:position="1.7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paragraph-properties>
        <style:tab-stops>
          <style:tab-stop style:position="1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Preformatted_20_Text">
      <style:paragraph-properties>
        <style:tab-stops>
          <style:tab-stop style:position="5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>
        <style:tab-stops>
          <style:tab-stop style:position="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Preformatted_20_Text">
      <style:paragraph-properties>
        <style:tab-stops>
          <style:tab-stop style:position="1.8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Preformatted_20_Text">
      <style:paragraph-properties>
        <style:tab-stops>
          <style:tab-stop style:position="3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Preformatted_20_Text">
      <style:paragraph-properties>
        <style:tab-stops>
          <style:tab-stop style:position="2.6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5" style:family="paragraph" style:parent-style-name="Preformatted_20_Text">
      <style:paragraph-properties>
        <style:tab-stops>
          <style:tab-stop style:position="3.1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6" style:family="paragraph" style:parent-style-name="Preformatted_20_Text">
      <style:paragraph-properties>
        <style:tab-stops>
          <style:tab-stop style:position="2.8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Preformatted_20_Text">
      <style:paragraph-properties>
        <style:tab-stops>
          <style:tab-stop style:position="5.1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Preformatted_20_Text">
      <style:paragraph-properties>
        <style:tab-stops>
          <style:tab-stop style:position="5.1252in"/>
        </style:tab-stops>
      </style:paragraph-properties>
      <style:text-properties fo:font-size="7pt" fo:font-weight="bold" officeooo:paragraph-rsid="001c7a2e" style:font-size-asian="7pt" style:font-weight-asian="bold" style:font-size-complex="7pt" style:font-weight-complex="bold"/>
    </style:style>
    <style:style style:name="P19" style:family="paragraph" style:parent-style-name="Preformatted_20_Text">
      <style:paragraph-properties>
        <style:tab-stops>
          <style:tab-stop style:position="5.75in"/>
        </style:tab-stops>
      </style:paragraph-properties>
      <style:text-properties fo:font-size="7pt" fo:font-weight="bold" officeooo:paragraph-rsid="001e43c1" style:font-size-asian="7pt" style:font-weight-asian="bold" style:font-size-complex="7pt" style:font-weight-complex="bold"/>
    </style:style>
    <style:style style:name="P20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1f842d" style:font-size-asian="7pt" style:font-weight-asian="bold" style:font-size-complex="7pt" style:font-weight-complex="bold"/>
    </style:style>
    <style:style style:name="P22" style:family="paragraph" style:parent-style-name="Preformatted_20_Text">
      <style:paragraph-properties>
        <style:tab-stops>
          <style:tab-stop style:position="4.75in"/>
        </style:tab-stops>
      </style:paragraph-properties>
      <style:text-properties fo:font-size="7pt" fo:font-weight="bold" officeooo:paragraph-rsid="0021581e" style:font-size-asian="7pt" style:font-weight-asian="bold" style:font-size-complex="7pt" style:font-weight-complex="bold"/>
    </style:style>
    <style:style style:name="P23" style:family="paragraph" style:parent-style-name="Preformatted_20_Text">
      <style:paragraph-properties>
        <style:tab-stops>
          <style:tab-stop style:position="4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4" style:family="paragraph" style:parent-style-name="Preformatted_20_Text">
      <style:paragraph-properties>
        <style:tab-stops>
          <style:tab-stop style:position="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5" style:family="paragraph" style:parent-style-name="Preformatted_20_Text">
      <style:paragraph-properties>
        <style:tab-stops>
          <style:tab-stop style:position="5.3752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6" style:family="paragraph" style:parent-style-name="Preformatted_20_Text">
      <style:paragraph-properties>
        <style:tab-stops>
          <style:tab-stop style:position="2.8126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7" style:family="paragraph" style:parent-style-name="Preformatted_20_Text">
      <style:paragraph-properties>
        <style:tab-stops>
          <style:tab-stop style:position="2.2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8" style:family="paragraph" style:parent-style-name="Preformatted_20_Text">
      <style:paragraph-properties>
        <style:tab-stops>
          <style:tab-stop style:position="2.75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Preformatted_20_Text">
      <style:paragraph-properties fo:margin-top="0in" fo:margin-bottom="0.1965in" style:contextual-spacing="false"/>
      <style:text-properties fo:font-size="7pt" fo:font-weight="bold" style:font-size-asian="7pt" style:font-weight-asian="bold" style:font-size-complex="7pt" style:font-weight-complex="bold"/>
    </style:style>
    <style:style style:name="P30" style:family="paragraph" style:parent-style-name="Preformatted_20_Text">
      <style:paragraph-properties fo:break-before="page"/>
      <style:text-properties fo:font-size="14pt" fo:font-weight="bold" officeooo:paragraph-rsid="0027a88a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fo:font-size="9pt" fo:font-weight="bold" officeooo:paragraph-rsid="0027a88a" style:font-size-asian="9pt" style:font-weight-asian="bold" style:font-size-complex="9pt" style:font-weight-complex="bold"/>
    </style:style>
    <style:style style:name="P32" style:family="paragraph" style:parent-style-name="Preformatted_20_Text">
      <style:paragraph-properties>
        <style:tab-stops>
          <style:tab-stop style:position="6.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3" style:family="paragraph" style:parent-style-name="Preformatted_20_Text"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4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5" style:family="paragraph" style:parent-style-name="Preformatted_20_Text">
      <style:paragraph-properties>
        <style:tab-stops>
          <style:tab-stop style:position="5.6252in"/>
        </style:tab-stops>
      </style:paragraph-properties>
      <style:text-properties fo:font-size="7pt" fo:font-weight="bold" officeooo:paragraph-rsid="0028f0aa" style:font-size-asian="7pt" style:font-weight-asian="bold" style:font-size-complex="7pt" style:font-weight-complex="bold"/>
    </style:style>
    <style:style style:name="P36" style:family="paragraph" style:parent-style-name="Preformatted_20_Text">
      <style:paragraph-properties>
        <style:tab-stops>
          <style:tab-stop style:position="6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7" style:family="paragraph" style:parent-style-name="Preformatted_20_Text">
      <style:paragraph-properties>
        <style:tab-stops>
          <style:tab-stop style:position="6.25in"/>
        </style:tab-stops>
      </style:paragraph-properties>
      <style:text-properties fo:font-size="7pt" fo:font-weight="bold" officeooo:paragraph-rsid="002ae240" style:font-size-asian="7pt" style:font-weight-asian="bold" style:font-size-complex="7pt" style:font-weight-complex="bold"/>
    </style:style>
    <style:style style:name="P38" style:family="paragraph" style:parent-style-name="Preformatted_20_Text">
      <style:paragraph-properties>
        <style:tab-stops>
          <style:tab-stop style:position="7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39" style:family="paragraph" style:parent-style-name="Preformatted_20_Text">
      <style:paragraph-properties>
        <style:tab-stops>
          <style:tab-stop style:position="7.25in"/>
        </style:tab-stops>
      </style:paragraph-properties>
      <style:text-properties fo:font-size="7pt" fo:font-weight="bold" officeooo:paragraph-rsid="002c81f7" style:font-size-asian="7pt" style:font-weight-asian="bold" style:font-size-complex="7pt" style:font-weight-complex="bold"/>
    </style:style>
    <style:style style:name="P40" style:family="paragraph" style:parent-style-name="Preformatted_20_Text">
      <style:paragraph-properties>
        <style:tab-stops>
          <style:tab-stop style:position="4.510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1" style:family="paragraph" style:parent-style-name="Preformatted_20_Text">
      <style:paragraph-properties>
        <style:tab-stops>
          <style:tab-stop style:position="3.25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2" style:family="paragraph" style:parent-style-name="Preformatted_20_Text">
      <style:paragraph-properties fo:break-before="page"/>
      <style:text-properties fo:font-size="9pt" fo:font-weight="bold" officeooo:paragraph-rsid="0027a88a" style:font-size-asian="9pt" style:font-weight-asian="bold" style:font-size-complex="9pt" style:font-weight-complex="bold"/>
    </style:style>
    <style:style style:name="P43" style:family="paragraph" style:parent-style-name="Preformatted_20_Text">
      <style:paragraph-properties>
        <style:tab-stops>
          <style:tab-stop style:position="7.37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P44" style:family="paragraph" style:parent-style-name="Preformatted_20_Text">
      <style:paragraph-properties>
        <style:tab-stops>
          <style:tab-stop style:position="7.3752in"/>
        </style:tab-stops>
      </style:paragraph-properties>
      <style:text-properties fo:font-size="7pt" fo:font-weight="bold" officeooo:paragraph-rsid="002e6663" style:font-size-asian="7pt" style:font-weight-asian="bold" style:font-size-complex="7pt" style:font-weight-complex="bold"/>
    </style:style>
    <style:style style:name="P45" style:family="paragraph" style:parent-style-name="Preformatted_20_Text">
      <style:paragraph-properties>
        <style:tab-stops>
          <style:tab-stop style:position="3.6252in"/>
        </style:tab-stops>
      </style:paragraph-properties>
      <style:text-properties fo:font-size="7pt" fo:font-weight="bold" officeooo:paragraph-rsid="0027a88a" style:font-size-asian="7pt" style:font-weight-asian="bold" style:font-size-complex="7pt" style:font-weight-complex="bold"/>
    </style:style>
    <style:style style:name="T1" style:family="text">
      <style:text-properties officeooo:rsid="0027a8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</text:span>core</text:p>
      <text:p text:style-name="P2">// Window-related functions</text:p>
      <text:p text:style-name="P3">void InitWindow(int width, int height, const char *title);<text:tab/>// Initialize window and OpenGL context</text:p>
      <text:p text:style-name="P3">void CloseWindow(void);<text:tab/>// Close window and unload OpenGL context</text:p>
      <text:p text:style-name="P3">bool WindowShouldClose(void);<text:tab/>// Check if application should close (KEY_ESCAPE pressed or windows close icon clicked)</text:p>
      <text:p text:style-name="P3">bool IsWindowReady(void);<text:tab/>// Check if window has been initialized successfully</text:p>
      <text:p text:style-name="P3">bool IsWindowFullscreen(void);<text:tab/>// Check if window is currently fullscreen</text:p>
      <text:p text:style-name="P3">bool IsWindowHidden(void);<text:tab/>// Check if window is currently hidden</text:p>
      <text:p text:style-name="P3">bool IsWindowMinimized(void);<text:tab/>// Check if window is currently minimized</text:p>
      <text:p text:style-name="P3">bool IsWindowMaximized(void);<text:tab/>// Check if window is currently maximized</text:p>
      <text:p text:style-name="P3">bool IsWindowFocused(void);<text:tab/>// Check if window is currently focused</text:p>
      <text:p text:style-name="P3">bool IsWindowResized(void);<text:tab/>// Check if window has been resized last frame</text:p>
      <text:p text:style-name="P3">bool IsWindowState(unsigned int flag);<text:tab/>// Check if one specific window flag is enabled</text:p>
      <text:p text:style-name="P3">void SetWindowState(unsigned int flags);<text:tab/>// Set window configuration state using flags</text:p>
      <text:p text:style-name="P3">void ClearWindowState(unsigned int flags);<text:tab/>// Clear window configuration state flags</text:p>
      <text:p text:style-name="P3">void ToggleFullscreen(void);<text:tab/>// Toggle window state: fullscreen/windowed, resizes monitor to match window resolution</text:p>
      <text:p text:style-name="P3">void ToggleBorderlessWindowed(void);<text:tab/>// Toggle window state: borderless windowed, resizes window to match monitor resolution</text:p>
      <text:p text:style-name="P3">void MaximizeWindow(void);<text:tab/>// Set window state: maximized, if resizable</text:p>
      <text:p text:style-name="P3">void MinimizeWindow(void);<text:tab/>// Set window state: minimized, if resizable</text:p>
      <text:p text:style-name="P3">void RestoreWindow(void);<text:tab/>// Restore window from being minimized/maximized</text:p>
      <text:p text:style-name="P3">void SetWindowIcon(Image image);<text:tab/>// Set icon for window (single image, RGBA 32bit)</text:p>
      <text:p text:style-name="P3">void SetWindowIcons(Image *images, int count);<text:tab/>// Set icon for window (multiple images, RGBA 32bit)</text:p>
      <text:p text:style-name="P3">void SetWindowTitle(const char *title);<text:tab/>// Set title for window</text:p>
      <text:p text:style-name="P3">void SetWindowPosition(int x, int y);<text:tab/>// Set window position on screen</text:p>
      <text:p text:style-name="P3">void SetWindowMonitor(int monitor);<text:tab/>// Set monitor for the current window</text:p>
      <text:p text:style-name="P3">void SetWindowMinSize(int width, int height);<text:tab/>// Set window minimum dimensions (for FLAG_WINDOW_RESIZABLE)</text:p>
      <text:p text:style-name="P3">void SetWindowMaxSize(int width, int height);<text:tab/>// Set window maximum dimensions (for FLAG_WINDOW_RESIZABLE)</text:p>
      <text:p text:style-name="P3">void SetWindowSize(int width, int height);<text:tab/>// Set window dimensions</text:p>
      <text:p text:style-name="P3">void SetWindowOpacity(float opacity);<text:tab/>// Set window opacity [0.0f..1.0f]</text:p>
      <text:p text:style-name="P3">void SetWindowFocused(void);<text:tab/>// Set window focused</text:p>
      <text:p text:style-name="P3">void *GetWindowHandle(void);<text:tab/>// Get native window handle</text:p>
      <text:p text:style-name="P3">int GetScreenWidth(void);<text:tab/>// Get current screen width</text:p>
      <text:p text:style-name="P3">int GetScreenHeight(void);<text:tab/>// Get current screen height</text:p>
      <text:p text:style-name="P3">int GetRenderWidth(void);<text:tab/>// Get current render width (it considers HiDPI)</text:p>
      <text:p text:style-name="P3">int GetRenderHeight(void);<text:tab/>// Get current render height (it considers HiDPI)</text:p>
      <text:p text:style-name="P3">int GetMonitorCount(void);<text:tab/>// Get number of connected monitors</text:p>
      <text:p text:style-name="P3">int GetCurrentMonitor(void);<text:tab/>// Get current monitor where window is placed</text:p>
      <text:p text:style-name="P3">Vector2 GetMonitorPosition(int monitor);<text:tab/>// Get specified monitor position</text:p>
      <text:p text:style-name="P3">int GetMonitorWidth(int monitor);<text:tab/>// Get specified monitor width (current video mode used by monitor)</text:p>
      <text:p text:style-name="P3">int GetMonitorHeight(int monitor);<text:tab/>// Get specified monitor height (current video mode used by monitor)</text:p>
      <text:p text:style-name="P3">int GetMonitorPhysicalWidth(int monitor);<text:tab/>// Get specified monitor physical width in millimetres</text:p>
      <text:p text:style-name="P3">int GetMonitorPhysicalHeight(int monitor);<text:tab/>// Get specified monitor physical height in millimetres</text:p>
      <text:p text:style-name="P3">int GetMonitorRefreshRate(int monitor);<text:tab/>// Get specified monitor refresh rate</text:p>
      <text:p text:style-name="P3">Vector2 GetWindowPosition(void);<text:tab/>// Get window position XY on monitor</text:p>
      <text:p text:style-name="P3">Vector2 GetWindowScaleDPI(void);<text:tab/>// Get window scale DPI factor</text:p>
      <text:p text:style-name="P3">const char *GetMonitorName(int monitor);<text:tab/>// Get the human-readable, UTF-8 encoded name of the specified monitor</text:p>
      <text:p text:style-name="P3">void SetClipboardText(const char *text);<text:tab/>// Set clipboard text content</text:p>
      <text:p text:style-name="P3">const char *GetClipboardText(void);<text:tab/>// Get clipboard text content</text:p>
      <text:p text:style-name="P3">Image GetClipboardImage(void);<text:tab/>// Get clipboard image content</text:p>
      <text:p text:style-name="P3">void EnableEventWaiting(void);<text:tab/>// Enable waiting for events on EndDrawing(), no automatic event polling</text:p>
      <text:p text:style-name="P3">void DisableEventWaiting(void);<text:tab/>// Disable waiting for events on EndDrawing(), automatic events polling</text:p>
      <text:p text:style-name="P4"/>
      <text:p text:style-name="P5">// Cursor-related functions</text:p>
      <text:p text:style-name="P6">void ShowCursor(void);<text:tab/>// Shows cursor</text:p>
      <text:p text:style-name="P6">void HideCursor(void);<text:tab/>// Hides cursor</text:p>
      <text:p text:style-name="P6">bool IsCursorHidden(void);<text:tab/>// Check if cursor is not visible</text:p>
      <text:p text:style-name="P6">void EnableCursor(void);<text:tab/>// Enables cursor (unlock cursor)</text:p>
      <text:p text:style-name="P6">void DisableCursor(void);<text:tab/>// Disables cursor (lock cursor)</text:p>
      <text:p text:style-name="P6">bool IsCursorOnScreen(void);<text:tab/>// Check if cursor is on the screen</text:p>
      <text:p text:style-name="P4"/>
      <text:p text:style-name="P2">// Drawing-related functions</text:p>
      <text:p text:style-name="P3">void ClearBackground(Color color);<text:tab/>// Set background color (framebuffer clear color)</text:p>
      <text:p text:style-name="P3">void BeginDrawing(void);<text:tab/>// Setup canvas (framebuffer) to start drawing</text:p>
      <text:p text:style-name="P3">void EndDrawing(void);<text:tab/>// End canvas drawing and swap buffers (double buffering)</text:p>
      <text:p text:style-name="P3"><text:soft-page-break/>void BeginMode2D(Camera2D camera);<text:tab/>// Begin 2D mode with custom camera (2D)</text:p>
      <text:p text:style-name="P3">void EndMode2D(void);<text:tab/>// Ends 2D mode with custom camera</text:p>
      <text:p text:style-name="P3">void BeginMode3D(Camera3D camera);<text:tab/>// Begin 3D mode with custom camera (3D)</text:p>
      <text:p text:style-name="P3">void EndMode3D(void);<text:tab/>// Ends 3D mode and returns to default 2D orthographic mode</text:p>
      <text:p text:style-name="P3">void BeginTextureMode(RenderTexture2D target);<text:tab/>// Begin drawing to render texture</text:p>
      <text:p text:style-name="P3">void EndTextureMode(void);<text:tab/>// Ends drawing to render texture</text:p>
      <text:p text:style-name="P3">void BeginShaderMode(Shader shader);<text:tab/>// Begin custom shader drawing</text:p>
      <text:p text:style-name="P3">void EndShaderMode(void);<text:tab/>// End custom shader drawing (use default shader)</text:p>
      <text:p text:style-name="P3">void BeginBlendMode(int mode);<text:tab/>// Begin blending mode (alpha, additive, multiplied, subtract, custom)</text:p>
      <text:p text:style-name="P3">void EndBlendMode(void);<text:tab/>// End blending mode (reset to default: alpha blending)</text:p>
      <text:p text:style-name="P3">void BeginScissorMode(int x, int y, int width, int height);<text:tab/>// Begin scissor mode (define screen area for following drawing)</text:p>
      <text:p text:style-name="P3">void EndScissorMode(void);<text:tab/>// End scissor mode</text:p>
      <text:p text:style-name="P3">void BeginVrStereoMode(VrStereoConfig config);<text:tab/>// Begin stereo rendering (requires VR simulator)</text:p>
      <text:p text:style-name="P3">void EndVrStereoMode(void);<text:tab/>// End stereo rendering (requires VR simulator)</text:p>
      <text:p text:style-name="P4"/>
      <text:p text:style-name="P7">// VR stereo config functions for VR simulator</text:p>
      <text:p text:style-name="P8">VrStereoConfig LoadVrStereoConfig(VrDeviceInfo device);<text:tab/>// Load VR stereo config for VR simulator device parameters</text:p>
      <text:p text:style-name="P8">void UnloadVrStereoConfig(VrStereoConfig config);<text:tab/>// Unload VR stereo config</text:p>
      <text:p text:style-name="P4"/>
      <text:p text:style-name="P9">// Shader management functions</text:p>
      <text:p text:style-name="P9">// NOTE: Shader functionality is not available on OpenGL 1.1</text:p>
      <text:p text:style-name="P10">Shader LoadShader(const char *vsFileName, const char *fsFileName);<text:tab/>// Load shader from files and bind default locations</text:p>
      <text:p text:style-name="P10">Shader LoadShaderFromMemory(const char *vsCode, const char *fsCode);<text:tab/>// Load shader from code strings and bind default locations</text:p>
      <text:p text:style-name="P10">bool IsShaderValid(Shader shader);<text:tab/>// Check if a shader is valid (loaded on GPU)</text:p>
      <text:p text:style-name="P10">int GetShaderLocation(Shader shader, const char *uniformName);<text:tab/>// Get shader uniform location</text:p>
      <text:p text:style-name="P10">int GetShaderLocationAttrib(Shader shader, const char *attribName);<text:tab/>// Get shader attribute location</text:p>
      <text:p text:style-name="P10">void SetShaderValue(Shader shader, int locIndex, const void *value, int uniformType);<text:tab/>// Set shader uniform value</text:p>
      <text:p text:style-name="P10">void SetShaderValueV(Shader shader, int locIndex, const void *value, int uniformType, int count);<text:tab/>// Set shader uniform value vector</text:p>
      <text:p text:style-name="P10">void SetShaderValueMatrix(Shader shader, int locIndex, Matrix mat);<text:tab/>// Set shader uniform value (matrix 4x4)</text:p>
      <text:p text:style-name="P10">void SetShaderValueTexture(Shader shader, int locIndex, Texture2D texture);<text:tab/>// Set shader uniform value and bind the texture (sampler2d)</text:p>
      <text:p text:style-name="P10">void UnloadShader(Shader shader);<text:tab/>// Unload shader from GPU memory (VRAM)</text:p>
      <text:p text:style-name="P4"/>
      <text:p text:style-name="P9">// Screen-space-related functions</text:p>
      <text:p text:style-name="P11">Ray GetScreenToWorldRay(Vector2 position, Camera camera);<text:tab/>// Get a ray trace from screen position (i.e mouse)</text:p>
      <text:p text:style-name="P11">Ray GetScreenToWorldRayEx(Vector2 position, Camera camera, int width, int height);<text:tab/>// Get a ray trace from screen position (i.e mouse) in a viewport</text:p>
      <text:p text:style-name="P11">Vector2 GetWorldToScreen(Vector3 position, Camera camera);<text:tab/>// Get the screen space position for a 3d world space position</text:p>
      <text:p text:style-name="P11">Vector2 GetWorldToScreenEx(Vector3 position, Camera camera, int width, int height);<text:tab/>// Get size position for a 3d world space position</text:p>
      <text:p text:style-name="P11">Vector2 GetWorldToScreen2D(Vector2 position, Camera2D camera);<text:tab/>// Get the screen space position for a 2d camera world space position</text:p>
      <text:p text:style-name="P11">Vector2 GetScreenToWorld2D(Vector2 position, Camera2D camera);<text:tab/>// Get the world space position for a 2d camera screen space position</text:p>
      <text:p text:style-name="P11">Matrix GetCameraMatrix(Camera camera);<text:tab/>// Get camera transform matrix (view matrix)</text:p>
      <text:p text:style-name="P11">Matrix GetCameraMatrix2D(Camera2D camera);<text:tab/>// Get camera 2d transform matrix</text:p>
      <text:p text:style-name="P4"/>
      <text:p text:style-name="P9">// Timing-related functions</text:p>
      <text:p text:style-name="P6">void SetTargetFPS(int fps);<text:tab/>// Set target FPS (maximum)</text:p>
      <text:p text:style-name="P6">float GetFrameTime(void);<text:tab/>// Get time in seconds for last frame drawn (delta time)</text:p>
      <text:p text:style-name="P6">double GetTime(void);<text:tab/>// Get elapsed time in seconds since InitWindow()</text:p>
      <text:p text:style-name="P6">int GetFPS(void);<text:tab/>// Get current FPS</text:p>
      <text:p text:style-name="P4"/>
      <text:p text:style-name="P9">// Custom frame control functions</text:p>
      <text:p text:style-name="P9">// NOTE: Those functions are intended for advanced users that want full control over the frame processing</text:p>
      <text:p text:style-name="P9">// By default EndDrawing() does this job: draws everything + SwapScreenBuffer() + manage frame timing + PollInputEvents()</text:p>
      <text:p text:style-name="P9">// To avoid that behaviour and control frame processes manually, enable in config.h: SUPPORT_CUSTOM_FRAME_CONTROL</text:p>
      <text:p text:style-name="P12">void SwapScreenBuffer(void);<text:tab/>// Swap back buffer with front buffer (screen drawing)</text:p>
      <text:p text:style-name="P12">void PollInputEvents(void);<text:tab/>// Register all input events</text:p>
      <text:p text:style-name="P12">void WaitTime(double seconds);<text:tab/>// Wait for some time (halt program execution)</text:p>
      <text:p text:style-name="P4"/>
      <text:p text:style-name="P9">// Random values generation functions</text:p>
      <text:p text:style-name="P13">void SetRandomSeed(unsigned int seed);<text:tab/>// Set the seed for the random number generator</text:p>
      <text:p text:style-name="P13">int GetRandomValue(int min, int max);<text:tab/>// Get a random value between min and max (both included)</text:p>
      <text:p text:style-name="P13">int *LoadRandomSequence(unsigned int count, int min, int max);<text:tab/>// Load random values sequence, no values repeated</text:p>
      <text:p text:style-name="P13">void UnloadRandomSequence(int *sequence);<text:tab/>// Unload random values sequence</text:p>
      <text:p text:style-name="P4"/>
      <text:p text:style-name="P4"/>
      <text:p text:style-name="P9"><text:soft-page-break/>// Misc. functions</text:p>
      <text:p text:style-name="P14">void TakeScreenshot(const char *fileName);<text:tab/>// Takes a screenshot of current screen (filename extension defines format)</text:p>
      <text:p text:style-name="P14">void SetConfigFlags(unsigned int flags);<text:tab/>// Setup init configuration flags (view FLAGS)</text:p>
      <text:p text:style-name="P14">void OpenURL(const char *url);<text:tab/>// Open URL with default system browser (if available)</text:p>
      <text:p text:style-name="P4"/>
      <text:p text:style-name="P9">// Logging system</text:p>
      <text:p text:style-name="P15">void SetTraceLogLevel(int logLevel);<text:tab/>// Set the current threshold (minimum) log level</text:p>
      <text:p text:style-name="P15">void TraceLog(int logLevel, const char *text, ...);<text:tab/>// Show trace log messages (LOG_DEBUG, LOG_INFO, LOG_WARNING, LOG_ERROR...)</text:p>
      <text:p text:style-name="P15">void SetTraceLogCallback(TraceLogCallback callback);<text:tab/>// Set custom trace log</text:p>
      <text:p text:style-name="P4"/>
      <text:p text:style-name="P9">// Memory management, using internal allocators</text:p>
      <text:p text:style-name="P16">void *MemAlloc(unsigned int size);<text:tab/>// Internal memory allocator</text:p>
      <text:p text:style-name="P16">void *MemRealloc(void *ptr, unsigned int size);<text:tab/>// Internal memory reallocator</text:p>
      <text:p text:style-name="P16">void MemFree(void *ptr);<text:tab/>// Internal memory free</text:p>
      <text:p text:style-name="P4"/>
      <text:p text:style-name="P9">// File system management functions</text:p>
      <text:p text:style-name="P17">unsigned char *LoadFileData(const char *fileName, int *dataSize);<text:tab/>// Load file data as byte array (read)</text:p>
      <text:p text:style-name="P17">void UnloadFileData(unsigned char *data);<text:tab/>// Unload file data allocated by LoadFileData()</text:p>
      <text:p text:style-name="P17">bool SaveFileData(const char *fileName, void *data, int dataSize);<text:tab/>// Save data to file from byte array (write), returns true on success</text:p>
      <text:p text:style-name="P17">bool ExportDataAsCode(const unsigned char *data, int dataSize, const char *fileName);<text:tab/>// Export data to code (.h), returns true on success</text:p>
      <text:p text:style-name="P17">char *LoadFileText(const char *fileName);<text:tab/>// Load text data from file (read), returns a '\0' terminated string</text:p>
      <text:p text:style-name="P17">void UnloadFileText(char *text);<text:tab/>// Unload file text data allocated by LoadFileText()</text:p>
      <text:p text:style-name="P18">bool SaveFileText(const char *fileName, const char *text);<text:tab/>// Save text data to file (write), string must be '\0' terminated, returns true on</text:p>
      <text:p text:style-name="P18"><text:tab/>// success</text:p>
      <text:p text:style-name="P4"/>
      <text:p text:style-name="P9">// File access custom callbacks</text:p>
      <text:p text:style-name="P9">// WARNING: Callbacks setup is intended for advanced users</text:p>
      <text:p text:style-name="P10">void SetLoadFileDataCallback(LoadFileDataCallback callback);<text:tab/>// Set custom file binary data loader</text:p>
      <text:p text:style-name="P10">void SetSaveFileDataCallback(SaveFileDataCallback callback);<text:tab/>// Set custom file binary data saver</text:p>
      <text:p text:style-name="P10">void SetLoadFileTextCallback(LoadFileTextCallback callback);<text:tab/>// Set custom file text data loader</text:p>
      <text:p text:style-name="P10">void SetSaveFileTextCallback(SaveFileTextCallback callback);<text:tab/>// Set custom file text data saver</text:p>
      <text:p text:style-name="P10">int FileRename(const char *fileName, const char *fileRename);<text:tab/>// Rename file (if exists)</text:p>
      <text:p text:style-name="P10">int FileRemove(const char *fileName);<text:tab/>// Remove file (if exists)</text:p>
      <text:p text:style-name="P19">int FileCopy(const char *srcPath, const char *dstPath);<text:tab/>// Copy file from one path to another, dstPath created if it doesn't</text:p>
      <text:p text:style-name="P19"><text:tab/>// exist</text:p>
      <text:p text:style-name="P19">int FileMove(const char *srcPath, const char *dstPath);<text:tab/>// Move file from one directory to another, dstPath created if it</text:p>
      <text:p text:style-name="P19"><text:tab/>// doesn't exist</text:p>
      <text:p text:style-name="P10">int FileTextReplace(const char *fileName, const char *search, const char *replacement);<text:tab/>// Replace text in an existing file</text:p>
      <text:p text:style-name="P10">int FileTextFindIndex(const char *fileName, const char *search);<text:tab/>// Find text in existing file</text:p>
      <text:p text:style-name="P10">bool FileExists(const char *fileName);<text:tab/>// Check if file exists</text:p>
      <text:p text:style-name="P10">bool DirectoryExists(const char *dirPath);<text:tab/>// Check if a directory path exists</text:p>
      <text:p text:style-name="P10">bool IsFileExtension(const char *fileName, const char *ext);<text:tab/>// Check file extension (recommended include point: .png, .wav)</text:p>
      <text:p text:style-name="P19">int GetFileLength(const char *fileName);<text:tab/>// Get file length in bytes (NOTE: GetFileSize() conflicts with</text:p>
      <text:p text:style-name="P19"><text:tab/>// windows.h)</text:p>
      <text:p text:style-name="P10">long GetFileModTime(const char *fileName);<text:tab/>// Get file modification time (last write time)</text:p>
      <text:p text:style-name="P10">const char *GetFileExtension(const char *fileName);<text:tab/>// Get pointer to extension for a filename string (includes dot: '.png')</text:p>
      <text:p text:style-name="P10">const char *GetFileName(const char *filePath);<text:tab/>// Get pointer to filename for a path string</text:p>
      <text:p text:style-name="P10">const char *GetFileNameWithoutExt(const char *filePath);<text:tab/>// Get filename string without extension (uses static string)</text:p>
      <text:p text:style-name="P10">const char *GetDirectoryPath(const char *filePath);<text:tab/>// Get full path for a given fileName with path (uses static string)</text:p>
      <text:p text:style-name="P10">const char *GetPrevDirectoryPath(const char *dirPath);<text:tab/>// Get previous directory path for a given path (uses static string)</text:p>
      <text:p text:style-name="P10">const char *GetWorkingDirectory(void);<text:tab/>// Get current working directory (uses static string)</text:p>
      <text:p text:style-name="P10">const char *GetApplicationDirectory(void);<text:tab/>// Get the directory of the running application (uses static string)</text:p>
      <text:p text:style-name="P10">int MakeDirectory(const char *dirPath);<text:tab/>// Create directories (including full path requested), returns 0 on successbool ChangeDirectory(const char *dirPath);<text:tab/>// Change working directory, return true on success</text:p>
      <text:p text:style-name="P10">bool IsPathFile(const char *path);<text:tab/>// Check if a given path is a file or a directory</text:p>
      <text:p text:style-name="P10">bool IsFileNameValid(const char *fileName);<text:tab/>// Check if fileName is valid for the platform/OS</text:p>
      <text:p text:style-name="P10">FilePathList LoadDirectoryFiles(const char *dirPath);<text:tab/>// Load directory filepaths, files and directories, no subdirs scan</text:p>
      <text:p text:style-name="P19">FilePathList LoadDirectoryFilesEx(const char *basePath, const char *filter, bool scanSubdirs);<text:tab/>// Load directory filepaths with extension filtering and subdir scan;</text:p>
      <text:p text:style-name="P19"><text:tab/>// some filters available: "*.*", "</text:p>
      <text:p text:style-name="P10">void UnloadDirectoryFiles(FilePathList files);<text:tab/>// Unload filepaths</text:p>
      <text:p text:style-name="P10">bool IsFileDropped(void);<text:tab/>// Check if a file has been dropped into window</text:p>
      <text:p text:style-name="P10">FilePathList LoadDroppedFiles(void);<text:tab/>// Load dropped filepaths</text:p>
      <text:p text:style-name="P10">void UnloadDroppedFiles(FilePathList files);<text:tab/>// Unload dropped filepaths</text:p>
      <text:p text:style-name="P10">unsigned int GetDirectoryFileCount(const char *dirPath);<text:tab/>// Get the file count in a directory</text:p>
      <text:p text:style-name="P19"><text:soft-page-break/>unsigned int GetDirectoryFileCountEx(const char *basePath, const char *filter, bool scanSubdirs);<text:tab/>// Get the file count in a directory with extension filtering and</text:p>
      <text:p text:style-name="P19"><text:tab/>// recursive directory scan. Use 'DI</text:p>
      <text:p text:style-name="P4"/>
      <text:p text:style-name="P9">// Compression/Encoding functionality</text:p>
      <text:p text:style-name="P20">unsigned char *CompressData(const unsigned char *data, int dataSize, int *compDataSize);<text:tab/>// Compress data (DEFLATE algorithm), memory must be MemFree()</text:p>
      <text:p text:style-name="P20">unsigned char *DecompressData(const unsigned char *compData, int compDataSize, int *dataSize);<text:tab/>// Decompress data (DEFLATE algorithm), memory must be MemFree()</text:p>
      <text:p text:style-name="P21">char *EncodeDataBase64(const unsigned char *data, int dataSize, int *outputSize);<text:tab/>// Encode data to Base64 string (includes NULL terminator), memory must be</text:p>
      <text:p text:style-name="P21"><text:tab/>// MemFree()</text:p>
      <text:p text:style-name="P21">unsigned char *DecodeDataBase64(const char *text, int *outputSize);<text:tab/>// Decode Base64 string (expected NULL terminated), memory must be</text:p>
      <text:p text:style-name="P21"><text:tab/>// MemFree()</text:p>
      <text:p text:style-name="P20">unsigned int ComputeCRC32(unsigned char *data, int dataSize);<text:tab/>// Compute CRC32 hash code</text:p>
      <text:p text:style-name="P20">unsigned int *ComputeMD5(unsigned char *data, int dataSize);<text:tab/>// Compute MD5 hash code, returns static int[4] (16 bytes)</text:p>
      <text:p text:style-name="P20">unsigned int *ComputeSHA1(unsigned char *data, int dataSize);<text:tab/>// Compute SHA1 hash code, returns static int[5] (20 bytes)</text:p>
      <text:p text:style-name="P20">unsigned int *ComputeSHA256(unsigned char *data, int dataSize);<text:tab/>// Compute SHA256 hash code, returns static int[8] (32 bytes)</text:p>
      <text:p text:style-name="P4"/>
      <text:p text:style-name="P9">// Automation events functionality</text:p>
      <text:p text:style-name="P22">AutomationEventList LoadAutomationEventList(const char *fileName);<text:tab/>// Load automation events list from file, NULL for empty list,</text:p>
      <text:p text:style-name="P22"><text:tab/>// capacity = MAX_AUTOMATION_EVENTS</text:p>
      <text:p text:style-name="P23">void UnloadAutomationEventList(AutomationEventList list);<text:tab/>// Unload automation events list from file</text:p>
      <text:p text:style-name="P23">bool ExportAutomationEventList(AutomationEventList list, const char *fileName);<text:tab/>// Export automation events list as text file</text:p>
      <text:p text:style-name="P23">void SetAutomationEventList(AutomationEventList *list);<text:tab/>// Set automation event list to record to</text:p>
      <text:p text:style-name="P23">void SetAutomationEventBaseFrame(int frame);<text:tab/>// Set automation event internal base frame to start recording</text:p>
      <text:p text:style-name="P23">void StartAutomationEventRecording(void);<text:tab/>// Start recording automation events (AutomationEventList must be set)</text:p>
      <text:p text:style-name="P23">void StopAutomationEventRecording(void);<text:tab/>// Stop recording automation events</text:p>
      <text:p text:style-name="P23">void PlayAutomationEvent(AutomationEvent event);<text:tab/>// Play a recorded automation event</text:p>
      <text:p text:style-name="P4"/>
      <text:p text:style-name="P9">//------------------------------------------------------------------------------------</text:p>
      <text:p text:style-name="P9">// Input Handling Functions (Module: core)</text:p>
      <text:p text:style-name="P9">//------------------------------------------------------------------------------------</text:p>
      <text:p text:style-name="P9">// Input-related functions: keyboard</text:p>
      <text:p text:style-name="P24">bool IsKeyPressed(int key);<text:tab/>// Check if a key has been pressed once</text:p>
      <text:p text:style-name="P24">bool IsKeyPressedRepeat(int key);<text:tab/>// Check if a key has been pressed again</text:p>
      <text:p text:style-name="P24">bool IsKeyDown(int key);<text:tab/>// Check if a key is being pressed</text:p>
      <text:p text:style-name="P24">bool IsKeyReleased(int key);<text:tab/>// Check if a key has been released once</text:p>
      <text:p text:style-name="P24">bool IsKeyUp(int key);<text:tab/>// Check if a key is NOT being pressed</text:p>
      <text:p text:style-name="P24">int GetKeyPressed(void);<text:tab/>// Get key pressed (keycode), call it multiple times for keys queued, returns 0 when the queue is empty</text:p>
      <text:p text:style-name="P24">int GetCharPressed(void);<text:tab/>// Get char pressed (unicode), call it multiple times for chars queued, returns 0 when the queue is empty</text:p>
      <text:p text:style-name="P24">const char *GetKeyName(int key);<text:tab/>// Get name of a QWERTY key on the current keyboard layout (eg returns string 'q' for KEY_A on an AZERTY keyboard)</text:p>
      <text:p text:style-name="P24">void SetExitKey(int key);<text:tab/>// Set a custom key to exit program (default is ESC)</text:p>
      <text:p text:style-name="P4"/>
      <text:p text:style-name="P9">// Input-related functions: gamepads</text:p>
      <text:p text:style-name="P25">bool IsGamepadAvailable(int gamepad);<text:tab/>// Check if a gamepad is available</text:p>
      <text:p text:style-name="P25">const char *GetGamepadName(int gamepad);<text:tab/>// Get gamepad internal name id</text:p>
      <text:p text:style-name="P25">bool IsGamepadButtonPressed(int gamepad, int button);<text:tab/>// Check if a gamepad button has been pressed once</text:p>
      <text:p text:style-name="P25">bool IsGamepadButtonDown(int gamepad, int button);<text:tab/>// Check if a gamepad button is being pressed</text:p>
      <text:p text:style-name="P25">bool IsGamepadButtonReleased(int gamepad, int button);<text:tab/>// Check if a gamepad button has been released once</text:p>
      <text:p text:style-name="P25">bool IsGamepadButtonUp(int gamepad, int button);<text:tab/>// Check if a gamepad button is NOT being pressed</text:p>
      <text:p text:style-name="P25">int GetGamepadButtonPressed(void);<text:tab/>// Get the last gamepad button pressed</text:p>
      <text:p text:style-name="P25">int GetGamepadAxisCount(int gamepad);<text:tab/>// Get axis count for a gamepad</text:p>
      <text:p text:style-name="P25">float GetGamepadAxisMovement(int gamepad, int axis);<text:tab/>// Get movement value for a gamepad axis</text:p>
      <text:p text:style-name="P25">int SetGamepadMappings(const char *mappings);<text:tab/>// Set internal gamepad mappings (SDL_GameControllerDB)</text:p>
      <text:p text:style-name="P25">void SetGamepadVibration(int gamepad, float leftMotor, float rightMotor, float duration);<text:tab/>// Set gamepad vibration for both motors (duration in seconds)</text:p>
      <text:p text:style-name="P4"/>
      <text:p text:style-name="P9">// Input-related functions: mouse</text:p>
      <text:p text:style-name="P26">bool IsMouseButtonPressed(int button);<text:tab/>// Check if a mouse button has been pressed once</text:p>
      <text:p text:style-name="P26">bool IsMouseButtonDown(int button);<text:tab/>// Check if a mouse button is being pressed</text:p>
      <text:p text:style-name="P26">bool IsMouseButtonReleased(int button);<text:tab/>// Check if a mouse button has been released once</text:p>
      <text:p text:style-name="P26">bool IsMouseButtonUp(int button);<text:tab/>// Check if a mouse button is NOT being pressed</text:p>
      <text:p text:style-name="P26">int GetMouseX(void);<text:tab/>// Get mouse position X</text:p>
      <text:p text:style-name="P26">int GetMouseY(void);<text:tab/>// Get mouse position Y</text:p>
      <text:p text:style-name="P26">Vector2 GetMousePosition(void);<text:tab/>// Get mouse position XY</text:p>
      <text:p text:style-name="P26">Vector2 GetMouseDelta(void);<text:tab/>// Get mouse delta between frames</text:p>
      <text:p text:style-name="P26">void SetMousePosition(int x, int y);<text:tab/>// Set mouse position XY</text:p>
      <text:p text:style-name="P26"><text:soft-page-break/>void SetMouseOffset(int offsetX, int offsetY);<text:tab/>// Set mouse offset</text:p>
      <text:p text:style-name="P26">void SetMouseScale(float scaleX, float scaleY);<text:tab/>// Set mouse scaling</text:p>
      <text:p text:style-name="P26">float GetMouseWheelMove(void);<text:tab/>// Get mouse wheel movement for X or Y, whichever is larger</text:p>
      <text:p text:style-name="P26">Vector2 GetMouseWheelMoveV(void);<text:tab/>// Get mouse wheel movement for both X and Y</text:p>
      <text:p text:style-name="P26">void SetMouseCursor(int cursor);<text:tab/>// Set mouse cursor</text:p>
      <text:p text:style-name="P4"/>
      <text:p text:style-name="P9">// Input-related functions: touch</text:p>
      <text:p text:style-name="P27">int GetTouchX(void);<text:tab/>// Get touch position X for touch point 0 (relative to screen size)</text:p>
      <text:p text:style-name="P27">int GetTouchY(void);<text:tab/>// Get touch position Y for touch point 0 (relative to screen size)</text:p>
      <text:p text:style-name="P27">Vector2 GetTouchPosition(int index);<text:tab/>// Get touch position XY for a touch point index (relative to screen size)</text:p>
      <text:p text:style-name="P27">int GetTouchPointId(int index);<text:tab/>// Get touch point identifier for given index</text:p>
      <text:p text:style-name="P27">int GetTouchPointCount(void);<text:tab/>// Get number of touch points</text:p>
      <text:p text:style-name="P4"/>
      <text:p text:style-name="P9">//------------------------------------------------------------------------------------</text:p>
      <text:p text:style-name="P9">// Gestures and Touch Handling Functions (Module: rgestures)</text:p>
      <text:p text:style-name="P9">//------------------------------------------------------------------------------------</text:p>
      <text:p text:style-name="P28">void SetGesturesEnabled(unsigned int flags);<text:tab/>// Enable a set of gestures using flags</text:p>
      <text:p text:style-name="P28">bool IsGestureDetected(unsigned int gesture);<text:tab/>// Check if a gesture have been detected</text:p>
      <text:p text:style-name="P28">int GetGestureDetected(void);<text:tab/>// Get latest detected gesture</text:p>
      <text:p text:style-name="P28">float GetGestureHoldDuration(void);<text:tab/>// Get gesture hold time in seconds</text:p>
      <text:p text:style-name="P28">Vector2 GetGestureDragVector(void);<text:tab/>// Get gesture drag vector</text:p>
      <text:p text:style-name="P28">float GetGestureDragAngle(void);<text:tab/>// Get gesture drag angle</text:p>
      <text:p text:style-name="P28">Vector2 GetGesturePinchVector(void);<text:tab/>// Get gesture pinch delta</text:p>
      <text:p text:style-name="P28">float GetGesturePinchAngle(void);<text:tab/>// Get gesture pinch angle</text:p>
      <text:p text:style-name="P4"/>
      <text:p text:style-name="P9">//------------------------------------------------------------------------------------</text:p>
      <text:p text:style-name="P9">// Camera System Functions (Module: rcamera)</text:p>
      <text:p text:style-name="P9">//------------------------------------------------------------------------------------</text:p>
      <text:p text:style-name="P17">void UpdateCamera(Camera *camera, int mode);<text:tab/>// Update camera position for selected mode</text:p>
      <text:p text:style-name="P17">void UpdateCameraPro(Camera *camera, Vector3 movement, Vector3 rotation, float zoom);<text:tab/>// Update camera movement/rotation</text:p>
      <text:p text:style-name="P4"/>
      <text:p text:style-name="P29"/>
      <text:p text:style-name="P29"/>
      <text:p text:style-name="P30">rtextures</text:p>
      <text:p text:style-name="P31">// Image loading functions</text:p>
      <text:p text:style-name="P31">// NOTE: These functions do not require GPU access</text:p>
      <text:p text:style-name="P32">Image LoadImage(const char *fileName);<text:tab/>// Load image from file into CPU memory (RAM)</text:p>
      <text:p text:style-name="P32">Image LoadImageRaw(const char *fileName, int width, int height, int format, int headerSize);<text:tab/>// Load image from RAW file data</text:p>
      <text:p text:style-name="P32">Image LoadImageAnim(const char *fileName, int *frames);<text:tab/>// Load image sequence from file (frames appended to</text:p>
      <text:p text:style-name="P32"><text:tab/>// image.data)</text:p>
      <text:p text:style-name="P32">Image LoadImageAnimFromMemory(const char *fileType, const unsigned char *fileData, int dataSize, int *frames);<text:tab/>// Load image sequence from memory buffer</text:p>
      <text:p text:style-name="P32">Image LoadImageFromMemory(const char *fileType, const unsigned char *fileData, int dataSize);<text:tab/>// Load image from memory buffer, fileType refers to</text:p>
      <text:p text:style-name="P32"><text:tab/>// extension: i.e. '.png'</text:p>
      <text:p text:style-name="P32">Image LoadImageFromTexture(Texture2D texture);<text:tab/>// Load image from GPU texture data</text:p>
      <text:p text:style-name="P32">Image LoadImageFromScreen(void);<text:tab/>// Load image from screen buffer and (screenshot)</text:p>
      <text:p text:style-name="P32">bool IsImageValid(Image image);<text:tab/>// Check if an image is valid (data and parameters)</text:p>
      <text:p text:style-name="P32">void UnloadImage(Image image);<text:tab/>// Unload image from CPU memory (RAM)</text:p>
      <text:p text:style-name="P32">bool ExportImage(Image image, const char *fileName);<text:tab/>// Export image data to file, returns true on success</text:p>
      <text:p text:style-name="P32">unsigned char *ExportImageToMemory(Image image, const char *fileType, int *fileSize);<text:tab/>// Export image to memory buffer, memory must be MemFree()</text:p>
      <text:p text:style-name="P32">bool ExportImageAsCode(Image image, const char *fileName);<text:tab/>// Export image as code file defining an array of bytes,</text:p>
      <text:p text:style-name="P32"><text:tab/>// returns true on success</text:p>
      <text:p text:style-name="P33"/>
      <text:p text:style-name="P31">// Image generation functions</text:p>
      <text:p text:style-name="P34">Image GenImageColor(int width, int height, Color color);<text:tab/>// Generate image: plain color</text:p>
      <text:p text:style-name="P35">Image GenImageGradientLinear(int width, int height, int direction, Color start, Color end);<text:tab/>// Generate image: linear gradient, direction in degrees [0..360],</text:p>
      <text:p text:style-name="P35"><text:tab/>// 0=Vertical gradient</text:p>
      <text:p text:style-name="P34">Image GenImageGradientRadial(int width, int height, float density, Color inner, Color outer);<text:tab/>// Generate image: radial gradient</text:p>
      <text:p text:style-name="P34">Image GenImageGradientSquare(int width, int height, float density, Color inner, Color outer);<text:tab/>// Generate image: square gradient</text:p>
      <text:p text:style-name="P34">Image GenImageChecked(int width, int height, int checksX, int checksY, Color col1, Color col2);<text:tab/>// Generate image: checked</text:p>
      <text:p text:style-name="P34">Image GenImageWhiteNoise(int width, int height, float factor);<text:tab/>// Generate image: white noise</text:p>
      <text:p text:style-name="P34">Image GenImagePerlinNoise(int width, int height, int offsetX, int offsetY, float scale);<text:tab/>// Generate image: perlin noise</text:p>
      <text:p text:style-name="P34">Image GenImageCellular(int width, int height, int tileSize);<text:tab/>// Generate image: cellular algorithm, bigger tileSize means bigger cells</text:p>
      <text:p text:style-name="P34">Image GenImageText(int width, int height, const char *text);<text:tab/>// Generate image: grayscale image from text data</text:p>
      <text:p text:style-name="P33"/>
      <text:p text:style-name="P31">// Image manipulation functions</text:p>
      <text:p text:style-name="P36">Image ImageCopy(Image image);<text:tab/>// Create an image duplicate (useful for transformations)</text:p>
      <text:p text:style-name="P36">Image ImageFromImage(Image image, Rectangle rec);<text:tab/>// Create an image from another image piece</text:p>
      <text:p text:style-name="P37">Image ImageFromChannel(Image image, int selectedChannel);<text:tab/>// Create an image from a selected channel of another image</text:p>
      <text:p text:style-name="P37"><text:tab/>// (GRAYSCALE)</text:p>
      <text:p text:style-name="P36">Image ImageText(const char *text, int fontSize, Color color);<text:tab/>// Create an image from text (default font)</text:p>
      <text:p text:style-name="P36">Image ImageTextEx(Font font, const char *text, float fontSize, float spacing, Color tint);<text:tab/>// Create an image from text (custom sprite font)</text:p>
      <text:p text:style-name="P36">void ImageFormat(Image *image, int newFormat);<text:tab/>// Convert image data to desired format</text:p>
      <text:p text:style-name="P36">void ImageToPOT(Image *image, Color fill);<text:tab/>// Convert image to POT (power-of-two)</text:p>
      <text:p text:style-name="P36">void ImageCrop(Image *image, Rectangle crop);<text:tab/>// Crop an image to a defined rectangle</text:p>
      <text:p text:style-name="P36">void ImageAlphaCrop(Image *image, float threshold);<text:tab/>// Crop image depending on alpha value</text:p>
      <text:p text:style-name="P36">void ImageAlphaClear(Image *image, Color color, float threshold);<text:tab/>// Clear alpha channel to desired color</text:p>
      <text:p text:style-name="P36">void ImageAlphaMask(Image *image, Image alphaMask);<text:tab/>// Apply alpha mask to image</text:p>
      <text:p text:style-name="P36">void ImageAlphaPremultiply(Image *image);<text:tab/>// Premultiply alpha channel</text:p>
      <text:p text:style-name="P36">void ImageBlurGaussian(Image *image, int blurSize);<text:tab/>// Apply Gaussian blur using a box blur approximation</text:p>
      <text:p text:style-name="P36">void ImageKernelConvolution(Image *image, const float *kernel, int kernelSize);<text:tab/>// Apply custom square convolution kernel to image</text:p>
      <text:p text:style-name="P36">void ImageResize(Image *image, int newWidth, int newHeight);<text:tab/>// Resize image (Bicubic scaling algorithm)</text:p>
      <text:p text:style-name="P36">void ImageResizeNN(Image *image, int newWidth, int newHeight);<text:tab/>// Resize image (Nearest-Neighbor scaling algorithm)</text:p>
      <text:p text:style-name="P36">void ImageResizeCanvas(Image *image, int newWidth, int newHeight, int offsetX, int offsetY, Color fill);<text:tab/>// Resize canvas and fill with color</text:p>
      <text:p text:style-name="P36">void ImageMipmaps(Image *image);<text:tab/>// Compute all mipmap levels for a provided image</text:p>
      <text:p text:style-name="P37">void ImageDither(Image *image, int rBpp, int gBpp, int bBpp, int aBpp);<text:tab/>// Dither image data to 16bpp or lower (Floyd-Steinberg</text:p>
      <text:p text:style-name="P37"><text:tab/>// dithering)</text:p>
      <text:p text:style-name="P36">void ImageFlipVertical(Image *image);<text:tab/>// Flip image vertically</text:p>
      <text:p text:style-name="P36">void ImageFlipHorizontal(Image *image);<text:tab/>// Flip image horizontally</text:p>
      <text:p text:style-name="P36">void ImageRotate(Image *image, int degrees);<text:tab/>// Rotate image by input angle in degrees (-359 to 359)</text:p>
      <text:p text:style-name="P36">void ImageRotateCW(Image *image);<text:tab/>// Rotate image clockwise 90deg</text:p>
      <text:p text:style-name="P36">void ImageRotateCCW(Image *image);<text:tab/>// Rotate image counter-clockwise 90deg</text:p>
      <text:p text:style-name="P36">void ImageColorTint(Image *image, Color color);<text:tab/>// Modify image color: tint</text:p>
      <text:p text:style-name="P36">void ImageColorInvert(Image *image);<text:tab/>// Modify image color: invert</text:p>
      <text:p text:style-name="P36">void ImageColorGrayscale(Image *image);<text:tab/>// Modify image color: grayscale</text:p>
      <text:p text:style-name="P36">void ImageColorContrast(Image *image, float contrast);<text:tab/>// Modify image color: contrast (-100 to 100)</text:p>
      <text:p text:style-name="P36">void ImageColorBrightness(Image *image, int brightness);<text:tab/>// Modify image color: brightness (-255 to 255)</text:p>
      <text:p text:style-name="P36">void ImageColorReplace(Image *image, Color color, Color replace);<text:tab/>// Modify image color: replace color</text:p>
      <text:p text:style-name="P36"><text:soft-page-break/>Color *LoadImageColors(Image image);<text:tab/>// Load color data from image as a Color array (RGBA - 32bit)</text:p>
      <text:p text:style-name="P37">Color *LoadImagePalette(Image image, int maxPaletteSize, int *colorCount);<text:tab/>// Load colors palette from image as a Color array (RGBA -</text:p>
      <text:p text:style-name="P37"><text:tab/>// 32bit)</text:p>
      <text:p text:style-name="P36">void UnloadImageColors(Color *colors);<text:tab/>// Unload color data loaded with LoadImageColors()</text:p>
      <text:p text:style-name="P36">void UnloadImagePalette(Color *colors);<text:tab/>// Unload colors palette loaded with LoadImagePalette()</text:p>
      <text:p text:style-name="P36">Rectangle GetImageAlphaBorder(Image image, float threshold);<text:tab/>// Get image alpha border rectangle</text:p>
      <text:p text:style-name="P36">Color GetImageColor(Image image, int x, int y);<text:tab/>// Get image pixel color at (x, y) position</text:p>
      <text:p text:style-name="P33"/>
      <text:p text:style-name="P31">// Image drawing functions</text:p>
      <text:p text:style-name="P31">// NOTE: Image software-rendering functions (CPU)</text:p>
      <text:p text:style-name="P38">void ImageClearBackground(Image *dst, Color color);<text:tab/>// Clear image background with given color</text:p>
      <text:p text:style-name="P38">void ImageDrawPixel(Image *dst, int posX, int posY, Color color);<text:tab/>// Draw pixel within an image</text:p>
      <text:p text:style-name="P38">void ImageDrawPixelV(Image *dst, Vector2 position, Color color);<text:tab/>// Draw pixel within an image (Vector version)</text:p>
      <text:p text:style-name="P38">void ImageDrawLine(Image *dst, int startPosX, int startPosY, int endPosX, int endPosY, Color color);<text:tab/>// Draw line within an image</text:p>
      <text:p text:style-name="P38">void ImageDrawLineV(Image *dst, Vector2 start, Vector2 end, Color color);<text:tab/>// Draw line within an image (Vector version)</text:p>
      <text:p text:style-name="P39">void ImageDrawLineEx(Image *dst, Vector2 start, Vector2 end, int thick, Color color);<text:tab/>// Draw a line defining thickness within an</text:p>
      <text:p text:style-name="P39"><text:tab/>// image</text:p>
      <text:p text:style-name="P38">void ImageDrawCircle(Image *dst, int centerX, int centerY, int radius, Color color);<text:tab/>// Draw a filled circle within an image</text:p>
      <text:p text:style-name="P39">void ImageDrawCircleV(Image *dst, Vector2 center, int radius, Color color);<text:tab/>// Draw a filled circle within an image (Vector</text:p>
      <text:p text:style-name="P39"><text:tab/>// version)</text:p>
      <text:p text:style-name="P38">void ImageDrawCircleLines(Image *dst, int centerX, int centerY, int radius, Color color);<text:tab/>// Draw circle outline within an image</text:p>
      <text:p text:style-name="P39">void ImageDrawCircleLinesV(Image *dst, Vector2 center, int radius, Color color);<text:tab/>// Draw circle outline within an image (Vector</text:p>
      <text:p text:style-name="P39"><text:tab/>// version)</text:p>
      <text:p text:style-name="P38">void ImageDrawRectangle(Image *dst, int posX, int posY, int width, int height, Color color);<text:tab/>// Draw rectangle within an image</text:p>
      <text:p text:style-name="P39">void ImageDrawRectangleV(Image *dst, Vector2 position, Vector2 size, Color color);<text:tab/>// Draw rectangle within an image (Vector</text:p>
      <text:p text:style-name="P39"><text:tab/>// version)</text:p>
      <text:p text:style-name="P38">void ImageDrawRectangleRec(Image *dst, Rectangle rec, Color color);<text:tab/>// Draw rectangle within an image</text:p>
      <text:p text:style-name="P38">void ImageDrawRectangleLines(Image *dst, Rectangle rec, int thick, Color color);<text:tab/>// Draw rectangle lines within an image</text:p>
      <text:p text:style-name="P38">void ImageDrawTriangle(Image *dst, Vector2 v1, Vector2 v2, Vector2 v3, Color color);<text:tab/>// Draw triangle within an image</text:p>
      <text:p text:style-name="P39">void ImageDrawTriangleEx(Image *dst, Vector2 v1, Vector2 v2, Vector2 v3, Color c1, Color c2, Color c3);<text:tab/>// Draw triangle with interpolated colors</text:p>
      <text:p text:style-name="P39"><text:tab/>// within an image</text:p>
      <text:p text:style-name="P38">void ImageDrawTriangleLines(Image *dst, Vector2 v1, Vector2 v2, Vector2 v3, Color color);<text:tab/>// Draw triangle outline within an image</text:p>
      <text:p text:style-name="P39">void ImageDrawTriangleFan(Image *dst, const Vector2 *points, int pointCount, Color color);<text:tab/>// Draw a triangle fan defined by points within</text:p>
      <text:p text:style-name="P39"><text:tab/>// an image (first vertex is the center)</text:p>
      <text:p text:style-name="P39">void ImageDrawTriangleStrip(Image *dst, const Vector2 *points, int pointCount, Color color);<text:tab/>// Draw a triangle strip defined by points</text:p>
      <text:p text:style-name="P39"><text:tab/>// within an image</text:p>
      <text:p text:style-name="P39">void ImageDraw(Image *dst, Image src, Rectangle srcRec, Rectangle dstRec, Color tint);<text:tab/>// Draw a source image within a destination</text:p>
      <text:p text:style-name="P39"><text:tab/>// image (tint applied to source)</text:p>
      <text:p text:style-name="P39">void ImageDrawText(Image *dst, const char *text, int posX, int posY, int fontSize, Color color);<text:tab/>// Draw text (using default font) within an</text:p>
      <text:p text:style-name="P39"><text:tab/>// image (destination)</text:p>
      <text:p text:style-name="P39">void ImageDrawTextEx(Image *dst, Font font, const char *text, Vector2 position, float fontSize, float spacing, Color tint);<text:tab/>// Draw text (custom sprite font) within an</text:p>
      <text:p text:style-name="P39"><text:tab/>// image (destination)</text:p>
      <text:p text:style-name="P33"/>
      <text:p text:style-name="P31">// Texture loading functions</text:p>
      <text:p text:style-name="P31">// NOTE: These functions require GPU access</text:p>
      <text:p text:style-name="P40">Texture2D LoadTexture(const char *fileName);<text:tab/>// Load texture from file into GPU memory (VRAM)</text:p>
      <text:p text:style-name="P40">Texture2D LoadTextureFromImage(Image image);<text:tab/>// Load texture from image data</text:p>
      <text:p text:style-name="P40">TextureCubemap LoadTextureCubemap(Image image, int layout);<text:tab/>// Load cubemap from image, multiple image cubemap layouts supported</text:p>
      <text:p text:style-name="P40">RenderTexture2D LoadRenderTexture(int width, int height);<text:tab/>// Load texture for rendering (framebuffer)</text:p>
      <text:p text:style-name="P40">bool IsTextureValid(Texture2D texture);<text:tab/>// Check if a texture is valid (loaded in GPU)</text:p>
      <text:p text:style-name="P40">void UnloadTexture(Texture2D texture);<text:tab/>// Unload texture from GPU memory (VRAM)</text:p>
      <text:p text:style-name="P40">bool IsRenderTextureValid(RenderTexture2D target);<text:tab/>// Check if a render texture is valid (loaded in GPU)</text:p>
      <text:p text:style-name="P40">void UnloadRenderTexture(RenderTexture2D target);<text:tab/>// Unload render texture from GPU memory (VRAM)</text:p>
      <text:p text:style-name="P40">void UpdateTexture(Texture2D texture, const void *pixels);<text:tab/>// Update GPU texture with new data (pixels should be able to fill texture)</text:p>
      <text:p text:style-name="P40">void UpdateTextureRec(Texture2D texture, Rectangle rec, const void *pixels);<text:tab/>// Update GPU texture rectangle with new data (pixels and rec should fit in texture)</text:p>
      <text:p text:style-name="P33"/>
      <text:p text:style-name="P31">// Texture configuration functions</text:p>
      <text:p text:style-name="P41">void GenTextureMipmaps(Texture2D *texture);<text:tab/>// Set texture scaling filter mode</text:p>
      <text:p text:style-name="P41">void SetTextureFilter(Texture2D texture, int filter);<text:tab/>// Set texture wrapping mode</text:p>
      <text:p text:style-name="P41">void SetTextureWrap(Texture2D texture, int wrap);<text:tab/>// Generate GPU mipmaps for a texture</text:p>
      <text:p text:style-name="P33"/>
      <text:p text:style-name="P42">// Texture drawing functions</text:p>
      <text:p text:style-name="P43">void DrawTexture(Texture2D texture, int posX, int posY, Color tint);<text:tab/>// Draw a Texture2D</text:p>
      <text:p text:style-name="P44">void DrawTextureV(Texture2D texture, Vector2 position, Color tint);<text:tab/>// Draw a Texture2D with position defined</text:p>
      <text:p text:style-name="P44"><text:tab/>// as Vector2</text:p>
      <text:p text:style-name="P44">void DrawTextureEx(Texture2D texture, Vector2 position, float rotation, float scale, Color tint);<text:tab/>// Draw a Texture2D with extended</text:p>
      <text:p text:style-name="P44"><text:tab/>// parameters</text:p>
      <text:p text:style-name="P44">void DrawTextureRec(Texture2D texture, Rectangle source, Vector2 position, Color tint);<text:tab/>// Draw a part of a texture defined by a</text:p>
      <text:p text:style-name="P44"><text:tab/>// rectangle</text:p>
      <text:p text:style-name="P44">void DrawTexturePro(Texture2D texture, Rectangle source, Rectangle dest, Vector2 origin, float rotation, Color tint);<text:tab/>// Draw a part of a texture defined by a</text:p>
      <text:p text:style-name="P44"><text:tab/>// rectangle with 'pro' parameters</text:p>
      <text:p text:style-name="P44">void DrawTextureNPatch(Texture2D texture, NPatchInfo nPatchInfo, Rectangle dest, Vector2 origin, float rotation, Color tint);<text:tab/>// Draws a texture (or part of it) that</text:p>
      <text:p text:style-name="P44"><text:tab/>// stretches or shrinks nicely</text:p>
      <text:p text:style-name="P33"/>
      <text:p text:style-name="P31">// Color/pixel related functions</text:p>
      <text:p text:style-name="P45">bool ColorIsEqual(Color col1, Color col2);<text:tab/>// Check if two colors are equal</text:p>
      <text:p text:style-name="P45">Color Fade(Color color, float alpha);<text:tab/>// Get color with alpha applied, alpha goes from 0.0f to 1.0f</text:p>
      <text:p text:style-name="P45">int ColorToInt(Color color);<text:tab/>// Get hexadecimal value for a Color (0xRRGGBBAA)</text:p>
      <text:p text:style-name="P45">Vector4 ColorNormalize(Color color);<text:tab/>// Get Color normalized as float [0..1]</text:p>
      <text:p text:style-name="P45">Color ColorFromNormalized(Vector4 normalized);<text:tab/>// Get Color from normalized values [0..1]</text:p>
      <text:p text:style-name="P45">Vector3 ColorToHSV(Color color);<text:tab/>// Get HSV values for a Color, hue [0..360], saturation/value [0..1]</text:p>
      <text:p text:style-name="P45">Color ColorFromHSV(float hue, float saturation, float value);<text:tab/>// Get a Color from HSV values, hue [0..360], saturation/value [0..1]</text:p>
      <text:p text:style-name="P45">Color ColorTint(Color color, Color tint);<text:tab/>// Get color multiplied with another color</text:p>
      <text:p text:style-name="P45">Color ColorBrightness(Color color, float factor);<text:tab/>// Get color with brightness correction, brightness factor goes from -1.0f to 1.0f</text:p>
      <text:p text:style-name="P45">Color ColorContrast(Color color, float contrast);<text:tab/>// Get color with contrast correction, contrast values between -1.0f and 1.0f</text:p>
      <text:p text:style-name="P45">Color ColorAlpha(Color color, float alpha);<text:tab/>// Get color with alpha applied, alpha goes from 0.0f to 1.0f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8</text:page-number><text:bookmark-end text:name="PageNumWizard_FOOTER_Default Page Style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3346a99e6b841765b75a9b29714a5b95c6761ce3</meta:generator>
    <dc:date>2026-07-02T14:21:59.820241078</dc:date>
    <meta:editing-duration>PT58M52S</meta:editing-duration>
    <meta:editing-cycles>33</meta:editing-cycles>
    <meta:document-statistic meta:table-count="0" meta:image-count="0" meta:object-count="0" meta:page-count="8" meta:paragraph-count="405" meta:word-count="4545" meta:character-count="33996" meta:non-whitespace-character-count="29825"/>
  </office:meta>
</office:document-meta>
</file>