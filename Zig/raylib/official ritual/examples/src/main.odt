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9pt" fo:font-weight="bold" style:font-size-asian="9pt" style:font-weight-asian="bold" style:font-size-complex="9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st rl = @import("raylib");</text:p>
      <text:p text:style-name="P1"/>
      <text:p text:style-name="P1">pub fn main() anyerror!void {</text:p>
      <text:p text:style-name="P1"><text:s text:c="4"/>// Initialization</text:p>
      <text:p text:style-name="P1"><text:s text:c="4"/>//--------------------------------------------------------------------------------------</text:p>
      <text:p text:style-name="P1"><text:s text:c="4"/>const screenWidth = 800;</text:p>
      <text:p text:style-name="P1"><text:s text:c="4"/>const screenHeight = 450;</text:p>
      <text:p text:style-name="P1"/>
      <text:p text:style-name="P1"><text:s text:c="4"/>rl.initWindow(screenWidth, screenHeight, "raylib-zig [core] example - 2d camera mouse zoom");</text:p>
      <text:p text:style-name="P1"><text:s text:c="4"/>defer rl.closeWindow(); // Close window and OpenGL context</text:p>
      <text:p text:style-name="P1"/>
      <text:p text:style-name="P1"><text:s text:c="4"/>var camera = rl.Camera2D{</text:p>
      <text:p text:style-name="P1"><text:s text:c="8"/>.target = .{ .x = 0, .y = 0 },</text:p>
      <text:p text:style-name="P1"><text:s text:c="8"/>.offset = .{ .x = 0, .y = 0 },</text:p>
      <text:p text:style-name="P1"><text:s text:c="8"/>.zoom = 1.0,</text:p>
      <text:p text:style-name="P1"><text:s text:c="8"/>.rotation = 0,</text:p>
      <text:p text:style-name="P1"><text:s text:c="4"/>};</text:p>
      <text:p text:style-name="P1"/>
      <text:p text:style-name="P1"><text:s text:c="4"/>rl.setTargetFPS(60); // Set our game to run at 60 frames-per-second</text:p>
      <text:p text:style-name="P1"><text:s text:c="4"/>//--------------------------------------------------------------------------------------</text:p>
      <text:p text:style-name="P1"/>
      <text:p text:style-name="P1"><text:s text:c="4"/>// Main game loop</text:p>
      <text:p text:style-name="P1"><text:s text:c="4"/>while (!rl.windowShouldClose()) { // Detect window close button or ESC key</text:p>
      <text:p text:style-name="P1"><text:s text:c="8"/>if (rl.isMouseButtonDown(.right)) {</text:p>
      <text:p text:style-name="P1"><text:s text:c="12"/>var delta = rl.getMouseDelta();</text:p>
      <text:p text:style-name="P1"><text:s text:c="12"/>delta = rl.math.vector2Scale(delta, -1.0 / camera.zoom);</text:p>
      <text:p text:style-name="P1"><text:s text:c="12"/>camera.target = rl.math.vector2Add(camera.target, delta);</text:p>
      <text:p text:style-name="P1"><text:s text:c="8"/>}</text:p>
      <text:p text:style-name="P1"/>
      <text:p text:style-name="P1"><text:s text:c="8"/>// Zoom based on mouse wheel</text:p>
      <text:p text:style-name="P1"><text:s text:c="8"/>const wheel = rl.getMouseWheelMove();</text:p>
      <text:p text:style-name="P1"><text:s text:c="8"/>if (wheel != 0) {</text:p>
      <text:p text:style-name="P1"><text:s text:c="12"/>// Get the world point that is under the mouse</text:p>
      <text:p text:style-name="P1"><text:s text:c="12"/>const mouseWorldPos = rl.getScreenToWorld2D(rl.getMousePosition(), camera);</text:p>
      <text:p text:style-name="P1"/>
      <text:p text:style-name="P1"><text:s text:c="12"/>// Set the offset to where the mouse is</text:p>
      <text:p text:style-name="P1"><text:s text:c="12"/>camera.offset = rl.getMousePosition();</text:p>
      <text:p text:style-name="P1"/>
      <text:p text:style-name="P1"><text:s text:c="12"/>// Set the target to match, so that the camera maps the world space point</text:p>
      <text:p text:style-name="P1"><text:s text:c="12"/>// under the cursor to the screen space point under the cursor at any zoom</text:p>
      <text:p text:style-name="P1"><text:s text:c="12"/>camera.target = mouseWorldPos;</text:p>
      <text:p text:style-name="P1"/>
      <text:p text:style-name="P1"><text:s text:c="12"/>// Zoom increment</text:p>
      <text:p text:style-name="P1"><text:s text:c="12"/>var scaleFactor = 1.0 + (0.25 * @abs(wheel));</text:p>
      <text:p text:style-name="P1"><text:s text:c="12"/>if (wheel &lt; 0) {</text:p>
      <text:p text:style-name="P1"><text:s text:c="16"/>scaleFactor = 1.0 / scaleFactor;</text:p>
      <text:p text:style-name="P1"><text:s text:c="12"/>}</text:p>
      <text:p text:style-name="P1"><text:s text:c="12"/>camera.zoom = rl.math.clamp(camera.zoom * scaleFactor, 0.125, 64.0);</text:p>
      <text:p text:style-name="P1"><text:s text:c="8"/>}</text:p>
      <text:p text:style-name="P1"><text:s text:c="8"/>//----------------------------------------------------------------------------------</text:p>
      <text:p text:style-name="P1"/>
      <text:p text:style-name="P1"><text:s text:c="8"/>// Draw</text:p>
      <text:p text:style-name="P1"><text:s text:c="8"/>//----------------------------------------------------------------------------------</text:p>
      <text:p text:style-name="P1"><text:s text:c="8"/>rl.beginDrawing();</text:p>
      <text:p text:style-name="P1"><text:s text:c="8"/>defer rl.endDrawing();</text:p>
      <text:p text:style-name="P1"/>
      <text:p text:style-name="P1"><text:s text:c="8"/>rl.clearBackground(.dark_green);</text:p>
      <text:p text:style-name="P1"/>
      <text:p text:style-name="P1"><text:s text:c="8"/>{</text:p>
      <text:p text:style-name="P1"><text:s text:c="12"/>camera.begin();</text:p>
      <text:p text:style-name="P1"><text:s text:c="12"/>defer camera.end();</text:p>
      <text:p text:style-name="P1"/>
      <text:p text:style-name="P1"><text:s text:c="12"/>// rl.drawCircle(screenWidth / 2, screenHeight / 2, 50, .maroon);</text:p>
      <text:p text:style-name="P1"><text:s text:c="12"/>rl.drawCircle(0, 0, 50, .maroon);</text:p>
      <text:p text:style-name="P1"><text:s text:c="8"/>}</text:p>
      <text:p text:style-name="P1"><text:s text:c="4"/>}</text:p>
      <text:p text:style-name="P1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7-03T22:38:34.613742962</dc:date>
    <meta:editing-duration>PT1M23S</meta:editing-duration>
    <meta:editing-cycles>1</meta:editing-cycles>
    <meta:document-statistic meta:table-count="0" meta:image-count="0" meta:object-count="0" meta:page-count="1" meta:paragraph-count="54" meta:word-count="246" meta:character-count="2362" meta:non-whitespace-character-count="1730"/>
    <meta:generator>LibreOffice/25.8.6.2$Linux_X86_64 LibreOffice_project/580$Build-2</meta:generator>
  </office:meta>
</office:document-meta>
</file>