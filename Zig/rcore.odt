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Preformatted_20_Text">
      <style:paragraph-properties>
        <style:tab-stops>
          <style:tab-stop style:position="3.5in"/>
        </style:tab-stops>
      </style:paragraph-properties>
      <style:text-properties fo:font-size="7pt" fo:font-weight="bold" style:font-size-asian="7pt" style:font-weight-asian="bold" style:font-size-complex="7pt" style:font-weight-complex="bold"/>
    </style:style>
    <style:style style:name="P3" style:family="paragraph" style:parent-style-name="Preformatted_20_Text">
      <style:text-properties fo:font-size="7pt" fo:font-weight="bold" style:font-size-asian="7pt" style:font-weight-asian="bold" style:font-size-complex="7pt" style:font-weight-complex="bold"/>
    </style:style>
    <style:style style:name="P4" style:family="paragraph" style:parent-style-name="Preformatted_20_Text">
      <style:paragraph-properties>
        <style:tab-stops>
          <style:tab-stop style:position="1.75in"/>
        </style:tab-stops>
      </style:paragraph-properties>
      <style:text-properties fo:font-size="9pt" fo:font-weight="bold" style:font-size-asian="9pt" style:font-weight-asian="bold" style:font-size-complex="9pt" style:font-weight-complex="bold"/>
    </style:style>
    <style:style style:name="P5" style:family="paragraph" style:parent-style-name="Preformatted_20_Text">
      <style:paragraph-properties>
        <style:tab-stops>
          <style:tab-stop style:position="1.75in"/>
        </style:tab-stops>
      </style:paragraph-properties>
      <style:text-properties fo:font-size="7pt" fo:font-weight="bold" style:font-size-asian="7pt" style:font-weight-asian="bold" style:font-size-complex="7pt" style:font-weight-complex="bold"/>
    </style:style>
    <style:style style:name="P6" style:family="paragraph" style:parent-style-name="Preformatted_20_Text">
      <style:paragraph-properties>
        <style:tab-stops>
          <style:tab-stop style:position="3.5in"/>
        </style:tab-stops>
      </style:paragraph-properties>
      <style:text-properties fo:font-size="9pt" fo:font-weight="bold" style:font-size-asian="9pt" style:font-weight-asian="bold" style:font-size-complex="9pt" style:font-weight-complex="bold"/>
    </style:style>
    <style:style style:name="P7" style:family="paragraph" style:parent-style-name="Preformatted_20_Text">
      <style:paragraph-properties>
        <style:tab-stops>
          <style:tab-stop style:position="3.25in"/>
        </style:tab-stops>
      </style:paragraph-properties>
      <style:text-properties fo:font-size="9pt" fo:font-weight="bold" style:font-size-asian="9pt" style:font-weight-asian="bold" style:font-size-complex="9pt" style:font-weight-complex="bold"/>
    </style:style>
    <style:style style:name="P8" style:family="paragraph" style:parent-style-name="Preformatted_20_Text">
      <style:paragraph-properties>
        <style:tab-stops>
          <style:tab-stop style:position="3.25in"/>
        </style:tab-stops>
      </style:paragraph-properties>
      <style:text-properties fo:font-size="7pt" fo:font-weight="bold" style:font-size-asian="7pt" style:font-weight-asian="bold" style:font-size-complex="7pt" style:font-weight-complex="bold"/>
    </style:style>
    <style:style style:name="P9" style:family="paragraph" style:parent-style-name="Preformatted_20_Text">
      <style:text-properties fo:font-size="9pt" fo:font-weight="bold" style:font-size-asian="9pt" style:font-weight-asian="bold" style:font-size-complex="9pt" style:font-weight-complex="bold"/>
    </style:style>
    <style:style style:name="P10" style:family="paragraph" style:parent-style-name="Preformatted_20_Text">
      <style:paragraph-properties>
        <style:tab-stops>
          <style:tab-stop style:position="5.75in"/>
        </style:tab-stops>
      </style:paragraph-properties>
      <style:text-properties fo:font-size="7pt" fo:font-weight="bold" style:font-size-asian="7pt" style:font-weight-asian="bold" style:font-size-complex="7pt" style:font-weight-complex="bold"/>
    </style:style>
    <style:style style:name="P11" style:family="paragraph" style:parent-style-name="Preformatted_20_Text">
      <style:paragraph-properties>
        <style:tab-stops>
          <style:tab-stop style:position="5in"/>
        </style:tab-stops>
      </style:paragraph-properties>
      <style:text-properties fo:font-size="7pt" fo:font-weight="bold" style:font-size-asian="7pt" style:font-weight-asian="bold" style:font-size-complex="7pt" style:font-weight-complex="bold"/>
    </style:style>
    <style:style style:name="P12" style:family="paragraph" style:parent-style-name="Preformatted_20_Text">
      <style:paragraph-properties>
        <style:tab-stops>
          <style:tab-stop style:position="1.8752in"/>
        </style:tab-stops>
      </style:paragraph-properties>
      <style:text-properties fo:font-size="7pt" fo:font-weight="bold" style:font-size-asian="7pt" style:font-weight-asian="bold" style:font-size-complex="7pt" style:font-weight-complex="bold"/>
    </style:style>
    <style:style style:name="P13" style:family="paragraph" style:parent-style-name="Preformatted_20_Text">
      <style:paragraph-properties>
        <style:tab-stops>
          <style:tab-stop style:position="3.75in"/>
        </style:tab-stops>
      </style:paragraph-properties>
      <style:text-properties fo:font-size="7pt" fo:font-weight="bold" style:font-size-asian="7pt" style:font-weight-asian="bold" style:font-size-complex="7pt" style:font-weight-complex="bold"/>
    </style:style>
    <style:style style:name="P14" style:family="paragraph" style:parent-style-name="Preformatted_20_Text">
      <style:paragraph-properties>
        <style:tab-stops>
          <style:tab-stop style:position="2.6252in"/>
        </style:tab-stops>
      </style:paragraph-properties>
      <style:text-properties fo:font-size="7pt" fo:font-weight="bold" style:font-size-asian="7pt" style:font-weight-asian="bold" style:font-size-complex="7pt" style:font-weight-complex="bold"/>
    </style:style>
    <style:style style:name="P15" style:family="paragraph" style:parent-style-name="Preformatted_20_Text">
      <style:paragraph-properties>
        <style:tab-stops>
          <style:tab-stop style:position="3.1252in"/>
        </style:tab-stops>
      </style:paragraph-properties>
      <style:text-properties fo:font-size="7pt" fo:font-weight="bold" style:font-size-asian="7pt" style:font-weight-asian="bold" style:font-size-complex="7pt" style:font-weight-complex="bold"/>
    </style:style>
    <style:style style:name="P16" style:family="paragraph" style:parent-style-name="Preformatted_20_Text">
      <style:paragraph-properties>
        <style:tab-stops>
          <style:tab-stop style:position="2.8752in"/>
        </style:tab-stops>
      </style:paragraph-properties>
      <style:text-properties fo:font-size="7pt" fo:font-weight="bold" style:font-size-asian="7pt" style:font-weight-asian="bold" style:font-size-complex="7pt" style:font-weight-complex="bold"/>
    </style:style>
    <style:style style:name="P17" style:family="paragraph" style:parent-style-name="Preformatted_20_Text">
      <style:paragraph-properties>
        <style:tab-stops>
          <style:tab-stop style:position="5.1252in"/>
        </style:tab-stops>
      </style:paragraph-properties>
      <style:text-properties fo:font-size="7pt" fo:font-weight="bold" style:font-size-asian="7pt" style:font-weight-asian="bold" style:font-size-complex="7pt" style:font-weight-complex="bold"/>
    </style:style>
    <style:style style:name="P18" style:family="paragraph" style:parent-style-name="Preformatted_20_Text">
      <style:paragraph-properties>
        <style:tab-stops>
          <style:tab-stop style:position="5.1252in"/>
        </style:tab-stops>
      </style:paragraph-properties>
      <style:text-properties fo:font-size="7pt" fo:font-weight="bold" officeooo:paragraph-rsid="001c7a2e" style:font-size-asian="7pt" style:font-weight-asian="bold" style:font-size-complex="7pt" style:font-weight-complex="bold"/>
    </style:style>
    <style:style style:name="P19" style:family="paragraph" style:parent-style-name="Preformatted_20_Text">
      <style:paragraph-properties>
        <style:tab-stops>
          <style:tab-stop style:position="5.75in"/>
        </style:tab-stops>
      </style:paragraph-properties>
      <style:text-properties fo:font-size="7pt" fo:font-weight="bold" officeooo:paragraph-rsid="001e43c1" style:font-size-asian="7pt" style:font-weight-asian="bold" style:font-size-complex="7pt" style:font-weight-complex="bold"/>
    </style:style>
    <style:style style:name="P20" style:family="paragraph" style:parent-style-name="Preformatted_20_Text">
      <style:paragraph-properties>
        <style:tab-stops>
          <style:tab-stop style:position="5.6252in"/>
        </style:tab-stops>
      </style:paragraph-properties>
      <style:text-properties fo:font-size="7pt" fo:font-weight="bold" style:font-size-asian="7pt" style:font-weight-asian="bold" style:font-size-complex="7pt" style:font-weight-complex="bold"/>
    </style:style>
    <style:style style:name="P21" style:family="paragraph" style:parent-style-name="Preformatted_20_Text">
      <style:paragraph-properties>
        <style:tab-stops>
          <style:tab-stop style:position="5.6252in"/>
        </style:tab-stops>
      </style:paragraph-properties>
      <style:text-properties fo:font-size="7pt" fo:font-weight="bold" officeooo:paragraph-rsid="001f842d" style:font-size-asian="7pt" style:font-weight-asian="bold" style:font-size-complex="7pt" style:font-weight-complex="bold"/>
    </style:style>
    <style:style style:name="P22" style:family="paragraph" style:parent-style-name="Preformatted_20_Text">
      <style:paragraph-properties>
        <style:tab-stops>
          <style:tab-stop style:position="4.75in"/>
        </style:tab-stops>
      </style:paragraph-properties>
      <style:text-properties fo:font-size="7pt" fo:font-weight="bold" officeooo:paragraph-rsid="0021581e" style:font-size-asian="7pt" style:font-weight-asian="bold" style:font-size-complex="7pt" style:font-weight-complex="bold"/>
    </style:style>
    <style:style style:name="P23" style:family="paragraph" style:parent-style-name="Preformatted_20_Text">
      <style:paragraph-properties>
        <style:tab-stops>
          <style:tab-stop style:position="4.75in"/>
        </style:tab-stops>
      </style:paragraph-properties>
      <style:text-properties fo:font-size="7pt" fo:font-weight="bold" style:font-size-asian="7pt" style:font-weight-asian="bold" style:font-size-complex="7pt" style:font-weight-complex="bold"/>
    </style:style>
    <style:style style:name="P24" style:family="paragraph" style:parent-style-name="Preformatted_20_Text">
      <style:paragraph-properties>
        <style:tab-stops>
          <style:tab-stop style:position="2in"/>
        </style:tab-stops>
      </style:paragraph-properties>
      <style:text-properties fo:font-size="7pt" fo:font-weight="bold" style:font-size-asian="7pt" style:font-weight-asian="bold" style:font-size-complex="7pt" style:font-weight-complex="bold"/>
    </style:style>
    <style:style style:name="P25" style:family="paragraph" style:parent-style-name="Preformatted_20_Text">
      <style:paragraph-properties>
        <style:tab-stops>
          <style:tab-stop style:position="5.3752in"/>
        </style:tab-stops>
      </style:paragraph-properties>
      <style:text-properties fo:font-size="7pt" fo:font-weight="bold" style:font-size-asian="7pt" style:font-weight-asian="bold" style:font-size-complex="7pt" style:font-weight-complex="bold"/>
    </style:style>
    <style:style style:name="P26" style:family="paragraph" style:parent-style-name="Preformatted_20_Text">
      <style:paragraph-properties>
        <style:tab-stops>
          <style:tab-stop style:position="2.8126in"/>
        </style:tab-stops>
      </style:paragraph-properties>
      <style:text-properties fo:font-size="7pt" fo:font-weight="bold" style:font-size-asian="7pt" style:font-weight-asian="bold" style:font-size-complex="7pt" style:font-weight-complex="bold"/>
    </style:style>
    <style:style style:name="P27" style:family="paragraph" style:parent-style-name="Preformatted_20_Text">
      <style:paragraph-properties>
        <style:tab-stops>
          <style:tab-stop style:position="2.25in"/>
        </style:tab-stops>
      </style:paragraph-properties>
      <style:text-properties fo:font-size="7pt" fo:font-weight="bold" style:font-size-asian="7pt" style:font-weight-asian="bold" style:font-size-complex="7pt" style:font-weight-complex="bold"/>
    </style:style>
    <style:style style:name="P28" style:family="paragraph" style:parent-style-name="Preformatted_20_Text">
      <style:paragraph-properties>
        <style:tab-stops>
          <style:tab-stop style:position="2.75in"/>
        </style:tab-stops>
      </style:paragraph-properties>
      <style:text-properties fo:font-size="7pt" fo:font-weight="bold" style:font-size-asian="7pt" style:font-weight-asian="bold" style:font-size-complex="7pt" style:font-weight-complex="bold"/>
    </style:style>
    <style:style style:name="T1" style:family="text">
      <style:text-properties fo:font-size="9pt" style:font-size-asian="9pt" style:font-size-complex="9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re</text:p>
      <text:p text:style-name="P2"><text:span text:style-name="T1">// Window-related functions</text:span></text:p>
      <text:p text:style-name="P2">void InitWindow(int width, int height, const char *title);<text:tab/>// Initialize window and OpenGL context</text:p>
      <text:p text:style-name="P2">void CloseWindow(void);<text:tab/>// Close window and unload OpenGL context</text:p>
      <text:p text:style-name="P2">bool WindowShouldClose(void);<text:tab/>// Check if application should close (KEY_ESCAPE pressed or windows close icon clicked)</text:p>
      <text:p text:style-name="P2">bool IsWindowReady(void);<text:tab/>// Check if window has been initialized successfully</text:p>
      <text:p text:style-name="P2">bool IsWindowFullscreen(void);<text:tab/>// Check if window is currently fullscreen</text:p>
      <text:p text:style-name="P2">bool IsWindowHidden(void);<text:tab/>// Check if window is currently hidden</text:p>
      <text:p text:style-name="P2">bool IsWindowMinimized(void);<text:tab/>// Check if window is currently minimized</text:p>
      <text:p text:style-name="P2">bool IsWindowMaximized(void);<text:tab/>// Check if window is currently maximized</text:p>
      <text:p text:style-name="P2">bool IsWindowFocused(void);<text:tab/>// Check if window is currently focused</text:p>
      <text:p text:style-name="P2">bool IsWindowResized(void);<text:tab/>// Check if window has been resized last frame</text:p>
      <text:p text:style-name="P2">bool IsWindowState(unsigned int flag);<text:tab/>// Check if one specific window flag is enabled</text:p>
      <text:p text:style-name="P2">void SetWindowState(unsigned int flags);<text:tab/>// Set window configuration state using flags</text:p>
      <text:p text:style-name="P2">void ClearWindowState(unsigned int flags);<text:tab/>// Clear window configuration state flags</text:p>
      <text:p text:style-name="P2">void ToggleFullscreen(void);<text:tab/>// Toggle window state: fullscreen/windowed, resizes monitor to match window resolution</text:p>
      <text:p text:style-name="P2">void ToggleBorderlessWindowed(void);<text:tab/>// Toggle window state: borderless windowed, resizes window to match monitor resolution</text:p>
      <text:p text:style-name="P2">void MaximizeWindow(void);<text:tab/>// Set window state: maximized, if resizable</text:p>
      <text:p text:style-name="P2">void MinimizeWindow(void);<text:tab/>// Set window state: minimized, if resizable</text:p>
      <text:p text:style-name="P2">void RestoreWindow(void);<text:tab/>// Restore window from being minimized/maximized</text:p>
      <text:p text:style-name="P2">void SetWindowIcon(Image image);<text:tab/>// Set icon for window (single image, RGBA 32bit)</text:p>
      <text:p text:style-name="P2">void SetWindowIcons(Image *images, int count);<text:tab/>// Set icon for window (multiple images, RGBA 32bit)</text:p>
      <text:p text:style-name="P2">void SetWindowTitle(const char *title);<text:tab/>// Set title for window</text:p>
      <text:p text:style-name="P2">void SetWindowPosition(int x, int y);<text:tab/>// Set window position on screen</text:p>
      <text:p text:style-name="P2">void SetWindowMonitor(int monitor);<text:tab/>// Set monitor for the current window</text:p>
      <text:p text:style-name="P2">void SetWindowMinSize(int width, int height);<text:tab/>// Set window minimum dimensions (for FLAG_WINDOW_RESIZABLE)</text:p>
      <text:p text:style-name="P2">void SetWindowMaxSize(int width, int height);<text:tab/>// Set window maximum dimensions (for FLAG_WINDOW_RESIZABLE)</text:p>
      <text:p text:style-name="P2">void SetWindowSize(int width, int height);<text:tab/>// Set window dimensions</text:p>
      <text:p text:style-name="P2">void SetWindowOpacity(float opacity);<text:tab/>// Set window opacity [0.0f..1.0f]</text:p>
      <text:p text:style-name="P2">void SetWindowFocused(void);<text:tab/>// Set window focused</text:p>
      <text:p text:style-name="P2">void *GetWindowHandle(void);<text:tab/>// Get native window handle</text:p>
      <text:p text:style-name="P2">int GetScreenWidth(void);<text:tab/>// Get current screen width</text:p>
      <text:p text:style-name="P2">int GetScreenHeight(void);<text:tab/>// Get current screen height</text:p>
      <text:p text:style-name="P2">int GetRenderWidth(void);<text:tab/>// Get current render width (it considers HiDPI)</text:p>
      <text:p text:style-name="P2">int GetRenderHeight(void);<text:tab/>// Get current render height (it considers HiDPI)</text:p>
      <text:p text:style-name="P2">int GetMonitorCount(void);<text:tab/>// Get number of connected monitors</text:p>
      <text:p text:style-name="P2">int GetCurrentMonitor(void);<text:tab/>// Get current monitor where window is placed</text:p>
      <text:p text:style-name="P2">Vector2 GetMonitorPosition(int monitor);<text:tab/>// Get specified monitor position</text:p>
      <text:p text:style-name="P2">int GetMonitorWidth(int monitor);<text:tab/>// Get specified monitor width (current video mode used by monitor)</text:p>
      <text:p text:style-name="P2">int GetMonitorHeight(int monitor);<text:tab/>// Get specified monitor height (current video mode used by monitor)</text:p>
      <text:p text:style-name="P2">int GetMonitorPhysicalWidth(int monitor);<text:tab/>// Get specified monitor physical width in millimetres</text:p>
      <text:p text:style-name="P2">int GetMonitorPhysicalHeight(int monitor);<text:tab/>// Get specified monitor physical height in millimetres</text:p>
      <text:p text:style-name="P2">int GetMonitorRefreshRate(int monitor);<text:tab/>// Get specified monitor refresh rate</text:p>
      <text:p text:style-name="P2">Vector2 GetWindowPosition(void);<text:tab/>// Get window position XY on monitor</text:p>
      <text:p text:style-name="P2">Vector2 GetWindowScaleDPI(void);<text:tab/>// Get window scale DPI factor</text:p>
      <text:p text:style-name="P2">const char *GetMonitorName(int monitor);<text:tab/>// Get the human-readable, UTF-8 encoded name of the specified monitor</text:p>
      <text:p text:style-name="P2">void SetClipboardText(const char *text);<text:tab/>// Set clipboard text content</text:p>
      <text:p text:style-name="P2">const char *GetClipboardText(void);<text:tab/>// Get clipboard text content</text:p>
      <text:p text:style-name="P2">Image GetClipboardImage(void);<text:tab/>// Get clipboard image content</text:p>
      <text:p text:style-name="P2">void EnableEventWaiting(void);<text:tab/>// Enable waiting for events on EndDrawing(), no automatic event polling</text:p>
      <text:p text:style-name="P2">void DisableEventWaiting(void);<text:tab/>// Disable waiting for events on EndDrawing(), automatic events polling</text:p>
      <text:p text:style-name="P3"/>
      <text:p text:style-name="P4">// Cursor-related functions</text:p>
      <text:p text:style-name="P5">void ShowCursor(void);<text:tab/>// Shows cursor</text:p>
      <text:p text:style-name="P5">void HideCursor(void);<text:tab/>// Hides cursor</text:p>
      <text:p text:style-name="P5">bool IsCursorHidden(void);<text:tab/>// Check if cursor is not visible</text:p>
      <text:p text:style-name="P5">void EnableCursor(void);<text:tab/>// Enables cursor (unlock cursor)</text:p>
      <text:p text:style-name="P5">void DisableCursor(void);<text:tab/>// Disables cursor (lock cursor)</text:p>
      <text:p text:style-name="P5">bool IsCursorOnScreen(void);<text:tab/>// Check if cursor is on the screen</text:p>
      <text:p text:style-name="P3"/>
      <text:p text:style-name="P6">// Drawing-related functions</text:p>
      <text:p text:style-name="P2">void ClearBackground(Color color);<text:tab/>// Set background color (framebuffer clear color)</text:p>
      <text:p text:style-name="P2">void BeginDrawing(void);<text:tab/>// Setup canvas (framebuffer) to start drawing</text:p>
      <text:p text:style-name="P2">void EndDrawing(void);<text:tab/>// End canvas drawing and swap buffers (double buffering)</text:p>
      <text:p text:style-name="P2"><text:soft-page-break/>void BeginMode2D(Camera2D camera);<text:tab/>// Begin 2D mode with custom camera (2D)</text:p>
      <text:p text:style-name="P2">void EndMode2D(void);<text:tab/>// Ends 2D mode with custom camera</text:p>
      <text:p text:style-name="P2">void BeginMode3D(Camera3D camera);<text:tab/>// Begin 3D mode with custom camera (3D)</text:p>
      <text:p text:style-name="P2">void EndMode3D(void);<text:tab/>// Ends 3D mode and returns to default 2D orthographic mode</text:p>
      <text:p text:style-name="P2">void BeginTextureMode(RenderTexture2D target);<text:tab/>// Begin drawing to render texture</text:p>
      <text:p text:style-name="P2">void EndTextureMode(void);<text:tab/>// Ends drawing to render texture</text:p>
      <text:p text:style-name="P2">void BeginShaderMode(Shader shader);<text:tab/>// Begin custom shader drawing</text:p>
      <text:p text:style-name="P2">void EndShaderMode(void);<text:tab/>// End custom shader drawing (use default shader)</text:p>
      <text:p text:style-name="P2">void BeginBlendMode(int mode);<text:tab/>// Begin blending mode (alpha, additive, multiplied, subtract, custom)</text:p>
      <text:p text:style-name="P2">void EndBlendMode(void);<text:tab/>// End blending mode (reset to default: alpha blending)</text:p>
      <text:p text:style-name="P2">void BeginScissorMode(int x, int y, int width, int height);<text:tab/>// Begin scissor mode (define screen area for following drawing)</text:p>
      <text:p text:style-name="P2">void EndScissorMode(void);<text:tab/>// End scissor mode</text:p>
      <text:p text:style-name="P2">void BeginVrStereoMode(VrStereoConfig config);<text:tab/>// Begin stereo rendering (requires VR simulator)</text:p>
      <text:p text:style-name="P2">void EndVrStereoMode(void);<text:tab/>// End stereo rendering (requires VR simulator)</text:p>
      <text:p text:style-name="P3"/>
      <text:p text:style-name="P7">// VR stereo config functions for VR simulator</text:p>
      <text:p text:style-name="P8">VrStereoConfig LoadVrStereoConfig(VrDeviceInfo device);<text:tab/>// Load VR stereo config for VR simulator device parameters</text:p>
      <text:p text:style-name="P8">void UnloadVrStereoConfig(VrStereoConfig config);<text:tab/>// Unload VR stereo config</text:p>
      <text:p text:style-name="P3"/>
      <text:p text:style-name="P9">// Shader management functions</text:p>
      <text:p text:style-name="P9">// NOTE: Shader functionality is not available on OpenGL 1.1</text:p>
      <text:p text:style-name="P10">Shader LoadShader(const char *vsFileName, const char *fsFileName);<text:tab/>// Load shader from files and bind default locations</text:p>
      <text:p text:style-name="P10">Shader LoadShaderFromMemory(const char *vsCode, const char *fsCode);<text:tab/>// Load shader from code strings and bind default locations</text:p>
      <text:p text:style-name="P10">bool IsShaderValid(Shader shader);<text:tab/>// Check if a shader is valid (loaded on GPU)</text:p>
      <text:p text:style-name="P10">int GetShaderLocation(Shader shader, const char *uniformName);<text:tab/>// Get shader uniform location</text:p>
      <text:p text:style-name="P10">int GetShaderLocationAttrib(Shader shader, const char *attribName);<text:tab/>// Get shader attribute location</text:p>
      <text:p text:style-name="P10">void SetShaderValue(Shader shader, int locIndex, const void *value, int uniformType);<text:tab/>// Set shader uniform value</text:p>
      <text:p text:style-name="P10">void SetShaderValueV(Shader shader, int locIndex, const void *value, int uniformType, int count);<text:tab/>// Set shader uniform value vector</text:p>
      <text:p text:style-name="P10">void SetShaderValueMatrix(Shader shader, int locIndex, Matrix mat);<text:tab/>// Set shader uniform value (matrix 4x4)</text:p>
      <text:p text:style-name="P10">void SetShaderValueTexture(Shader shader, int locIndex, Texture2D texture);<text:tab/>// Set shader uniform value and bind the texture (sampler2d)</text:p>
      <text:p text:style-name="P10">void UnloadShader(Shader shader);<text:tab/>// Unload shader from GPU memory (VRAM)</text:p>
      <text:p text:style-name="P3"/>
      <text:p text:style-name="P9">// Screen-space-related functions</text:p>
      <text:p text:style-name="P11">Ray GetScreenToWorldRay(Vector2 position, Camera camera);<text:tab/>// Get a ray trace from screen position (i.e mouse)</text:p>
      <text:p text:style-name="P11">Ray GetScreenToWorldRayEx(Vector2 position, Camera camera, int width, int height);<text:tab/>// Get a ray trace from screen position (i.e mouse) in a viewport</text:p>
      <text:p text:style-name="P11">Vector2 GetWorldToScreen(Vector3 position, Camera camera);<text:tab/>// Get the screen space position for a 3d world space position</text:p>
      <text:p text:style-name="P11">Vector2 GetWorldToScreenEx(Vector3 position, Camera camera, int width, int height);<text:tab/>// Get size position for a 3d world space position</text:p>
      <text:p text:style-name="P11">Vector2 GetWorldToScreen2D(Vector2 position, Camera2D camera);<text:tab/>// Get the screen space position for a 2d camera world space position</text:p>
      <text:p text:style-name="P11">Vector2 GetScreenToWorld2D(Vector2 position, Camera2D camera);<text:tab/>// Get the world space position for a 2d camera screen space position</text:p>
      <text:p text:style-name="P11">Matrix GetCameraMatrix(Camera camera);<text:tab/>// Get camera transform matrix (view matrix)</text:p>
      <text:p text:style-name="P11">Matrix GetCameraMatrix2D(Camera2D camera);<text:tab/>// Get camera 2d transform matrix</text:p>
      <text:p text:style-name="P3"/>
      <text:p text:style-name="P9">// Timing-related functions</text:p>
      <text:p text:style-name="P5">void SetTargetFPS(int fps);<text:tab/>// Set target FPS (maximum)</text:p>
      <text:p text:style-name="P5">float GetFrameTime(void);<text:tab/>// Get time in seconds for last frame drawn (delta time)</text:p>
      <text:p text:style-name="P5">double GetTime(void);<text:tab/>// Get elapsed time in seconds since InitWindow()</text:p>
      <text:p text:style-name="P5">int GetFPS(void);<text:tab/>// Get current FPS</text:p>
      <text:p text:style-name="P3"/>
      <text:p text:style-name="P9">// Custom frame control functions</text:p>
      <text:p text:style-name="P9">// NOTE: Those functions are intended for advanced users that want full control over the frame processing</text:p>
      <text:p text:style-name="P9">// By default EndDrawing() does this job: draws everything + SwapScreenBuffer() + manage frame timing + PollInputEvents()</text:p>
      <text:p text:style-name="P9">// To avoid that behaviour and control frame processes manually, enable in config.h: SUPPORT_CUSTOM_FRAME_CONTROL</text:p>
      <text:p text:style-name="P12">void SwapScreenBuffer(void);<text:tab/>// Swap back buffer with front buffer (screen drawing)</text:p>
      <text:p text:style-name="P12">void PollInputEvents(void);<text:tab/>// Register all input events</text:p>
      <text:p text:style-name="P12">void WaitTime(double seconds);<text:tab/>// Wait for some time (halt program execution)</text:p>
      <text:p text:style-name="P3"/>
      <text:p text:style-name="P9">// Random values generation functions</text:p>
      <text:p text:style-name="P13">void SetRandomSeed(unsigned int seed);<text:tab/>// Set the seed for the random number generator</text:p>
      <text:p text:style-name="P13">int GetRandomValue(int min, int max);<text:tab/>// Get a random value between min and max (both included)</text:p>
      <text:p text:style-name="P13">int *LoadRandomSequence(unsigned int count, int min, int max);<text:tab/>// Load random values sequence, no values repeated</text:p>
      <text:p text:style-name="P13">void UnloadRandomSequence(int *sequence);<text:tab/>// Unload random values sequence</text:p>
      <text:p text:style-name="P3"/>
      <text:p text:style-name="P9">// Misc. functions</text:p>
      <text:p text:style-name="P14"><text:soft-page-break/>void TakeScreenshot(const char *fileName);<text:tab/>// Takes a screenshot of current screen (filename extension defines format)</text:p>
      <text:p text:style-name="P14">void SetConfigFlags(unsigned int flags);<text:tab/>// Setup init configuration flags (view FLAGS)</text:p>
      <text:p text:style-name="P14">void OpenURL(const char *url);<text:tab/>// Open URL with default system browser (if available)</text:p>
      <text:p text:style-name="P3"/>
      <text:p text:style-name="P9">// Logging system</text:p>
      <text:p text:style-name="P15">void SetTraceLogLevel(int logLevel);<text:tab/>// Set the current threshold (minimum) log level</text:p>
      <text:p text:style-name="P15">void TraceLog(int logLevel, const char *text, ...);<text:tab/>// Show trace log messages (LOG_DEBUG, LOG_INFO, LOG_WARNING, LOG_ERROR...)</text:p>
      <text:p text:style-name="P15">void SetTraceLogCallback(TraceLogCallback callback);<text:tab/>// Set custom trace log</text:p>
      <text:p text:style-name="P3"/>
      <text:p text:style-name="P9">// Memory management, using internal allocators</text:p>
      <text:p text:style-name="P16">void *MemAlloc(unsigned int size);<text:tab/>// Internal memory allocator</text:p>
      <text:p text:style-name="P16">void *MemRealloc(void *ptr, unsigned int size);<text:tab/>// Internal memory reallocator</text:p>
      <text:p text:style-name="P16">void MemFree(void *ptr);<text:tab/>// Internal memory free</text:p>
      <text:p text:style-name="P3"/>
      <text:p text:style-name="P9">// File system management functions</text:p>
      <text:p text:style-name="P17">unsigned char *LoadFileData(const char *fileName, int *dataSize);<text:tab/>// Load file data as byte array (read)</text:p>
      <text:p text:style-name="P17">void UnloadFileData(unsigned char *data);<text:tab/>// Unload file data allocated by LoadFileData()</text:p>
      <text:p text:style-name="P17">bool SaveFileData(const char *fileName, void *data, int dataSize);<text:tab/>// Save data to file from byte array (write), returns true on success</text:p>
      <text:p text:style-name="P17">bool ExportDataAsCode(const unsigned char *data, int dataSize, const char *fileName);<text:tab/>// Export data to code (.h), returns true on success</text:p>
      <text:p text:style-name="P17">char *LoadFileText(const char *fileName);<text:tab/>// Load text data from file (read), returns a '\0' terminated string</text:p>
      <text:p text:style-name="P17">void UnloadFileText(char *text);<text:tab/>// Unload file text data allocated by LoadFileText()</text:p>
      <text:p text:style-name="P18">bool SaveFileText(const char *fileName, const char *text);<text:tab/>// Save text data to file (write), string must be '\0' terminated, returns true on</text:p>
      <text:p text:style-name="P18"><text:tab/>// success</text:p>
      <text:p text:style-name="P3"/>
      <text:p text:style-name="P9">// File access custom callbacks</text:p>
      <text:p text:style-name="P9">// WARNING: Callbacks setup is intended for advanced users</text:p>
      <text:p text:style-name="P10">void SetLoadFileDataCallback(LoadFileDataCallback callback);<text:tab/>// Set custom file binary data loader</text:p>
      <text:p text:style-name="P10">void SetSaveFileDataCallback(SaveFileDataCallback callback);<text:tab/>// Set custom file binary data saver</text:p>
      <text:p text:style-name="P10">void SetLoadFileTextCallback(LoadFileTextCallback callback);<text:tab/>// Set custom file text data loader</text:p>
      <text:p text:style-name="P10">void SetSaveFileTextCallback(SaveFileTextCallback callback);<text:tab/>// Set custom file text data saver</text:p>
      <text:p text:style-name="P10">int FileRename(const char *fileName, const char *fileRename);<text:tab/>// Rename file (if exists)</text:p>
      <text:p text:style-name="P10">int FileRemove(const char *fileName);<text:tab/>// Remove file (if exists)</text:p>
      <text:p text:style-name="P19">int FileCopy(const char *srcPath, const char *dstPath);<text:tab/>// Copy file from one path to another, dstPath created if it doesn't</text:p>
      <text:p text:style-name="P19"><text:tab/>// exist</text:p>
      <text:p text:style-name="P19">int FileMove(const char *srcPath, const char *dstPath);<text:tab/>// Move file from one directory to another, dstPath created if it</text:p>
      <text:p text:style-name="P19"><text:tab/>// doesn't exist</text:p>
      <text:p text:style-name="P10">int FileTextReplace(const char *fileName, const char *search, const char *replacement);<text:tab/>// Replace text in an existing file</text:p>
      <text:p text:style-name="P10">int FileTextFindIndex(const char *fileName, const char *search);<text:tab/>// Find text in existing file</text:p>
      <text:p text:style-name="P10">bool FileExists(const char *fileName);<text:tab/>// Check if file exists</text:p>
      <text:p text:style-name="P10">bool DirectoryExists(const char *dirPath);<text:tab/>// Check if a directory path exists</text:p>
      <text:p text:style-name="P10">bool IsFileExtension(const char *fileName, const char *ext);<text:tab/>// Check file extension (recommended include point: .png, .wav)</text:p>
      <text:p text:style-name="P19">int GetFileLength(const char *fileName);<text:tab/>// Get file length in bytes (NOTE: GetFileSize() conflicts with</text:p>
      <text:p text:style-name="P19"><text:tab/>// windows.h)</text:p>
      <text:p text:style-name="P10">long GetFileModTime(const char *fileName);<text:tab/>// Get file modification time (last write time)</text:p>
      <text:p text:style-name="P10">const char *GetFileExtension(const char *fileName);<text:tab/>// Get pointer to extension for a filename string (includes dot: '.png')</text:p>
      <text:p text:style-name="P10">const char *GetFileName(const char *filePath);<text:tab/>// Get pointer to filename for a path string</text:p>
      <text:p text:style-name="P10">const char *GetFileNameWithoutExt(const char *filePath);<text:tab/>// Get filename string without extension (uses static string)</text:p>
      <text:p text:style-name="P10">const char *GetDirectoryPath(const char *filePath);<text:tab/>// Get full path for a given fileName with path (uses static string)</text:p>
      <text:p text:style-name="P10">const char *GetPrevDirectoryPath(const char *dirPath);<text:tab/>// Get previous directory path for a given path (uses static string)</text:p>
      <text:p text:style-name="P10">const char *GetWorkingDirectory(void);<text:tab/>// Get current working directory (uses static string)</text:p>
      <text:p text:style-name="P10">const char *GetApplicationDirectory(void);<text:tab/>// Get the directory of the running application (uses static string)</text:p>
      <text:p text:style-name="P10">int MakeDirectory(const char *dirPath);<text:tab/>// Create directories (including full path requested), returns 0 on successbool ChangeDirectory(const char *dirPath);<text:tab/>// Change working directory, return true on success</text:p>
      <text:p text:style-name="P10">bool IsPathFile(const char *path);<text:tab/>// Check if a given path is a file or a directory</text:p>
      <text:p text:style-name="P10">bool IsFileNameValid(const char *fileName);<text:tab/>// Check if fileName is valid for the platform/OS</text:p>
      <text:p text:style-name="P10">FilePathList LoadDirectoryFiles(const char *dirPath);<text:tab/>// Load directory filepaths, files and directories, no subdirs scan</text:p>
      <text:p text:style-name="P19">FilePathList LoadDirectoryFilesEx(const char *basePath, const char *filter, bool scanSubdirs);<text:tab/>// Load directory filepaths with extension filtering and subdir scan;</text:p>
      <text:p text:style-name="P19"><text:tab/>// some filters available: "*.*", "</text:p>
      <text:p text:style-name="P10">void UnloadDirectoryFiles(FilePathList files);<text:tab/>// Unload filepaths</text:p>
      <text:p text:style-name="P10">bool IsFileDropped(void);<text:tab/>// Check if a file has been dropped into window</text:p>
      <text:p text:style-name="P10">FilePathList LoadDroppedFiles(void);<text:tab/>// Load dropped filepaths</text:p>
      <text:p text:style-name="P10">void UnloadDroppedFiles(FilePathList files);<text:tab/>// Unload dropped filepaths</text:p>
      <text:p text:style-name="P10">unsigned int GetDirectoryFileCount(const char *dirPath);<text:tab/>// Get the file count in a directory</text:p>
      <text:p text:style-name="P19">unsigned int GetDirectoryFileCountEx(const char *basePath, const char *filter, bool scanSubdirs);<text:tab/>// Get the file count in a directory with extension filtering and</text:p>
      <text:p text:style-name="P19"><text:soft-page-break/><text:tab/>// recursive directory scan. Use 'DI</text:p>
      <text:p text:style-name="P3"/>
      <text:p text:style-name="P9">// Compression/Encoding functionality</text:p>
      <text:p text:style-name="P20">unsigned char *CompressData(const unsigned char *data, int dataSize, int *compDataSize);<text:tab/>// Compress data (DEFLATE algorithm), memory must be MemFree()</text:p>
      <text:p text:style-name="P20">unsigned char *DecompressData(const unsigned char *compData, int compDataSize, int *dataSize);<text:tab/>// Decompress data (DEFLATE algorithm), memory must be MemFree()</text:p>
      <text:p text:style-name="P21">char *EncodeDataBase64(const unsigned char *data, int dataSize, int *outputSize);<text:tab/>// Encode data to Base64 string (includes NULL terminator), memory must be</text:p>
      <text:p text:style-name="P21"><text:tab/>// MemFree()</text:p>
      <text:p text:style-name="P21">unsigned char *DecodeDataBase64(const char *text, int *outputSize);<text:tab/>// Decode Base64 string (expected NULL terminated), memory must be</text:p>
      <text:p text:style-name="P21"><text:tab/>// MemFree()</text:p>
      <text:p text:style-name="P20">unsigned int ComputeCRC32(unsigned char *data, int dataSize);<text:tab/>// Compute CRC32 hash code</text:p>
      <text:p text:style-name="P20">unsigned int *ComputeMD5(unsigned char *data, int dataSize);<text:tab/>// Compute MD5 hash code, returns static int[4] (16 bytes)</text:p>
      <text:p text:style-name="P20">unsigned int *ComputeSHA1(unsigned char *data, int dataSize);<text:tab/>// Compute SHA1 hash code, returns static int[5] (20 bytes)</text:p>
      <text:p text:style-name="P20">unsigned int *ComputeSHA256(unsigned char *data, int dataSize);<text:tab/>// Compute SHA256 hash code, returns static int[8] (32 bytes)</text:p>
      <text:p text:style-name="P3"/>
      <text:p text:style-name="P9">// Automation events functionality</text:p>
      <text:p text:style-name="P22">AutomationEventList LoadAutomationEventList(const char *fileName);<text:tab/>// Load automation events list from file, NULL for empty list,</text:p>
      <text:p text:style-name="P22"><text:tab/>// capacity = MAX_AUTOMATION_EVENTS</text:p>
      <text:p text:style-name="P23">void UnloadAutomationEventList(AutomationEventList list);<text:tab/>// Unload automation events list from file</text:p>
      <text:p text:style-name="P23">bool ExportAutomationEventList(AutomationEventList list, const char *fileName);<text:tab/>// Export automation events list as text file</text:p>
      <text:p text:style-name="P23">void SetAutomationEventList(AutomationEventList *list);<text:tab/>// Set automation event list to record to</text:p>
      <text:p text:style-name="P23">void SetAutomationEventBaseFrame(int frame);<text:tab/>// Set automation event internal base frame to start recording</text:p>
      <text:p text:style-name="P23">void StartAutomationEventRecording(void);<text:tab/>// Start recording automation events (AutomationEventList must be set)</text:p>
      <text:p text:style-name="P23">void StopAutomationEventRecording(void);<text:tab/>// Stop recording automation events</text:p>
      <text:p text:style-name="P23">void PlayAutomationEvent(AutomationEvent event);<text:tab/>// Play a recorded automation event</text:p>
      <text:p text:style-name="P3"/>
      <text:p text:style-name="P9">//------------------------------------------------------------------------------------</text:p>
      <text:p text:style-name="P9">// Input Handling Functions (Module: core)</text:p>
      <text:p text:style-name="P9">//------------------------------------------------------------------------------------</text:p>
      <text:p text:style-name="P9">// Input-related functions: keyboard</text:p>
      <text:p text:style-name="P24">bool IsKeyPressed(int key);<text:tab/>// Check if a key has been pressed once</text:p>
      <text:p text:style-name="P24">bool IsKeyPressedRepeat(int key);<text:tab/>// Check if a key has been pressed again</text:p>
      <text:p text:style-name="P24">bool IsKeyDown(int key);<text:tab/>// Check if a key is being pressed</text:p>
      <text:p text:style-name="P24">bool IsKeyReleased(int key);<text:tab/>// Check if a key has been released once</text:p>
      <text:p text:style-name="P24">bool IsKeyUp(int key);<text:tab/>// Check if a key is NOT being pressed</text:p>
      <text:p text:style-name="P24">int GetKeyPressed(void);<text:tab/>// Get key pressed (keycode), call it multiple times for keys queued, returns 0 when the queue is empty</text:p>
      <text:p text:style-name="P24">int GetCharPressed(void);<text:tab/>// Get char pressed (unicode), call it multiple times for chars queued, returns 0 when the queue is empty</text:p>
      <text:p text:style-name="P24">const char *GetKeyName(int key);<text:tab/>// Get name of a QWERTY key on the current keyboard layout (eg returns string 'q' for KEY_A on an AZERTY keyboard)</text:p>
      <text:p text:style-name="P24">void SetExitKey(int key);<text:tab/>// Set a custom key to exit program (default is ESC)</text:p>
      <text:p text:style-name="P3"/>
      <text:p text:style-name="P9">// Input-related functions: gamepads</text:p>
      <text:p text:style-name="P25">bool IsGamepadAvailable(int gamepad);<text:tab/>// Check if a gamepad is available</text:p>
      <text:p text:style-name="P25">const char *GetGamepadName(int gamepad);<text:tab/>// Get gamepad internal name id</text:p>
      <text:p text:style-name="P25">bool IsGamepadButtonPressed(int gamepad, int button);<text:tab/>// Check if a gamepad button has been pressed once</text:p>
      <text:p text:style-name="P25">bool IsGamepadButtonDown(int gamepad, int button);<text:tab/>// Check if a gamepad button is being pressed</text:p>
      <text:p text:style-name="P25">bool IsGamepadButtonReleased(int gamepad, int button);<text:tab/>// Check if a gamepad button has been released once</text:p>
      <text:p text:style-name="P25">bool IsGamepadButtonUp(int gamepad, int button);<text:tab/>// Check if a gamepad button is NOT being pressed</text:p>
      <text:p text:style-name="P25">int GetGamepadButtonPressed(void);<text:tab/>// Get the last gamepad button pressed</text:p>
      <text:p text:style-name="P25">int GetGamepadAxisCount(int gamepad);<text:tab/>// Get axis count for a gamepad</text:p>
      <text:p text:style-name="P25">float GetGamepadAxisMovement(int gamepad, int axis);<text:tab/>// Get movement value for a gamepad axis</text:p>
      <text:p text:style-name="P25">int SetGamepadMappings(const char *mappings);<text:tab/>// Set internal gamepad mappings (SDL_GameControllerDB)</text:p>
      <text:p text:style-name="P25">void SetGamepadVibration(int gamepad, float leftMotor, float rightMotor, float duration);<text:tab/>// Set gamepad vibration for both motors (duration in seconds)</text:p>
      <text:p text:style-name="P3"/>
      <text:p text:style-name="P9">// Input-related functions: mouse</text:p>
      <text:p text:style-name="P26">bool IsMouseButtonPressed(int button);<text:tab/>// Check if a mouse button has been pressed once</text:p>
      <text:p text:style-name="P26">bool IsMouseButtonDown(int button);<text:tab/>// Check if a mouse button is being pressed</text:p>
      <text:p text:style-name="P26">bool IsMouseButtonReleased(int button);<text:tab/>// Check if a mouse button has been released once</text:p>
      <text:p text:style-name="P26">bool IsMouseButtonUp(int button);<text:tab/>// Check if a mouse button is NOT being pressed</text:p>
      <text:p text:style-name="P26">int GetMouseX(void);<text:tab/>// Get mouse position X</text:p>
      <text:p text:style-name="P26">int GetMouseY(void);<text:tab/>// Get mouse position Y</text:p>
      <text:p text:style-name="P26">Vector2 GetMousePosition(void);<text:tab/>// Get mouse position XY</text:p>
      <text:p text:style-name="P26">Vector2 GetMouseDelta(void);<text:tab/>// Get mouse delta between frames</text:p>
      <text:p text:style-name="P26">void SetMousePosition(int x, int y);<text:tab/>// Set mouse position XY</text:p>
      <text:p text:style-name="P26">void SetMouseOffset(int offsetX, int offsetY);<text:tab/>// Set mouse offset</text:p>
      <text:p text:style-name="P26"><text:soft-page-break/>void SetMouseScale(float scaleX, float scaleY);<text:tab/>// Set mouse scaling</text:p>
      <text:p text:style-name="P26">float GetMouseWheelMove(void);<text:tab/>// Get mouse wheel movement for X or Y, whichever is larger</text:p>
      <text:p text:style-name="P26">Vector2 GetMouseWheelMoveV(void);<text:tab/>// Get mouse wheel movement for both X and Y</text:p>
      <text:p text:style-name="P26">void SetMouseCursor(int cursor);<text:tab/>// Set mouse cursor</text:p>
      <text:p text:style-name="P3"/>
      <text:p text:style-name="P9">// Input-related functions: touch</text:p>
      <text:p text:style-name="P27">int GetTouchX(void);<text:tab/>// Get touch position X for touch point 0 (relative to screen size)</text:p>
      <text:p text:style-name="P27">int GetTouchY(void);<text:tab/>// Get touch position Y for touch point 0 (relative to screen size)</text:p>
      <text:p text:style-name="P27">Vector2 GetTouchPosition(int index);<text:tab/>// Get touch position XY for a touch point index (relative to screen size)</text:p>
      <text:p text:style-name="P27">int GetTouchPointId(int index);<text:tab/>// Get touch point identifier for given index</text:p>
      <text:p text:style-name="P27">int GetTouchPointCount(void);<text:tab/>// Get number of touch points</text:p>
      <text:p text:style-name="P3"/>
      <text:p text:style-name="P9">//------------------------------------------------------------------------------------</text:p>
      <text:p text:style-name="P9">// Gestures and Touch Handling Functions (Module: rgestures)</text:p>
      <text:p text:style-name="P9">//------------------------------------------------------------------------------------</text:p>
      <text:p text:style-name="P28">void SetGesturesEnabled(unsigned int flags);<text:tab/>// Enable a set of gestures using flags</text:p>
      <text:p text:style-name="P28">bool IsGestureDetected(unsigned int gesture);<text:tab/>// Check if a gesture have been detected</text:p>
      <text:p text:style-name="P28">int GetGestureDetected(void);<text:tab/>// Get latest detected gesture</text:p>
      <text:p text:style-name="P28">float GetGestureHoldDuration(void);<text:tab/>// Get gesture hold time in seconds</text:p>
      <text:p text:style-name="P28">Vector2 GetGestureDragVector(void);<text:tab/>// Get gesture drag vector</text:p>
      <text:p text:style-name="P28">float GetGestureDragAngle(void);<text:tab/>// Get gesture drag angle</text:p>
      <text:p text:style-name="P28">Vector2 GetGesturePinchVector(void);<text:tab/>// Get gesture pinch delta</text:p>
      <text:p text:style-name="P28">float GetGesturePinchAngle(void);<text:tab/>// Get gesture pinch angle</text:p>
      <text:p text:style-name="P3"/>
      <text:p text:style-name="P9">//------------------------------------------------------------------------------------</text:p>
      <text:p text:style-name="P9">// Camera System Functions (Module: rcamera)</text:p>
      <text:p text:style-name="P9">//------------------------------------------------------------------------------------</text:p>
      <text:p text:style-name="P17">void UpdateCamera(Camera *camera, int mode);<text:tab/>// Update camera position for selected mode</text:p>
      <text:p text:style-name="P17">void UpdateCameraPro(Camera *camera, Vector3 movement, Vector3 rotation, float zoom);<text:tab/>// Update camera movement/rotation</text:p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5in" style:type="center"/>
          <style:tab-stop style:position="10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5in" style:type="center"/>
          <style:tab-stop style:position="10in" style:type="right"/>
        </style:tab-stops>
      </style:paragraph-properties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11in" fo:page-height="8.5in" style:num-format="1" style:print-orientation="landscape" fo:margin-top="0.5in" fo:margin-bottom="0.5in" fo:margin-left="0.5in" fo:margin-right="0.5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0402in" fo:margin-left="0in" fo:margin-right="0in" fo:margin-top="0in" fo:background-color="transparent" style:dynamic-spacing="false" draw:fill="none"/>
      </style:footer-style>
    </style:page-layout>
  </office:automatic-styles>
  <office:master-styles>
    <style:master-page style:name="Standard" style:page-layout-name="Mpm1">
      <style:footer>
        <text:p text:style-name="MP1"><text:bookmark-start text:name="PageNumWizard_FOOTER_Default Page Style4"/><text:page-number text:select-page="current">2</text:page-number><text:bookmark-end text:name="PageNumWizard_FOOTER_Default Page Style4"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6.2.4.2$Linux_X86_64 LibreOffice_project/3346a99e6b841765b75a9b29714a5b95c6761ce3</meta:generator>
    <dc:date>2026-07-02T12:49:13.414862129</dc:date>
    <meta:editing-duration>PT40M27S</meta:editing-duration>
    <meta:editing-cycles>23</meta:editing-cycles>
    <meta:document-statistic meta:table-count="0" meta:image-count="0" meta:object-count="0" meta:page-count="5" meta:paragraph-count="262" meta:word-count="2812" meta:character-count="21429" meta:non-whitespace-character-count="18870"/>
  </office:meta>
</office:document-meta>
</file>